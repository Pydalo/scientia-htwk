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6pt" style:text-underline-style="solid" style:text-underline-width="auto" style:text-underline-color="font-color" fo:font-weight="bold" officeooo:rsid="001a6bde" officeooo:paragraph-rsid="001a6bde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2pt" fo:font-style="italic" fo:font-weight="normal" officeooo:rsid="0018d9fd" officeooo:paragraph-rsid="0014370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22pt" fo:font-weight="bold" officeooo:rsid="001abd16" officeooo:paragraph-rsid="001abd16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0pt" fo:font-weight="bold" officeooo:rsid="001abd16" officeooo:paragraph-rsid="001abd1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style="italic" fo:font-weight="bold" officeooo:rsid="001c801e" officeooo:paragraph-rsid="001c801e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 style:list-style-name="L1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c801e" officeooo:paragraph-rsid="001c801e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style="normal" fo:font-weight="normal" officeooo:rsid="001c801e" officeooo:paragraph-rsid="001c801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1d3ab4" officeooo:paragraph-rsid="001d3ab4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 style:list-style-name="L4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text-properties fo:font-size="12pt" fo:font-style="normal" fo:font-weight="normal" officeooo:rsid="001d3ab4" officeooo:paragraph-rsid="001d3ab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20pt" fo:font-style="italic" fo:font-weight="bold" officeooo:rsid="001d6de4" officeooo:paragraph-rsid="001d6de4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 style:list-style-name="L7">
      <style:text-properties fo:font-size="12pt" fo:font-style="normal" fo:font-weight="normal" officeooo:rsid="001d6de4" officeooo:paragraph-rsid="001d6de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text-properties fo:font-size="12pt" fo:font-style="normal" fo:font-weight="normal" officeooo:rsid="001ea281" officeooo:paragraph-rsid="001ea2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22pt" fo:font-weight="bold" officeooo:rsid="00143700" officeooo:paragraph-rsid="00143700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12pt" fo:font-weight="bold" officeooo:rsid="00143700" officeooo:paragraph-rsid="0014370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style="italic" fo:font-weight="normal" officeooo:rsid="0018d9fd" officeooo:paragraph-rsid="0018d9fd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22pt" fo:font-style="italic" fo:font-weight="bold" officeooo:rsid="00145e82" officeooo:paragraph-rsid="00145e82" style:font-size-asian="22pt" style:font-style-asian="italic" style:font-weight-asian="bold" style:font-size-complex="22pt" style:font-style-complex="italic" style:font-weight-complex="bold"/>
    </style:style>
    <style:style style:name="P23" style:family="paragraph" style:parent-style-name="Standard">
      <style:text-properties fo:font-size="12pt" fo:font-weight="normal" officeooo:rsid="00143700" officeooo:paragraph-rsid="0014370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25" style:family="paragraph" style:parent-style-name="Standard" style:list-style-name="L8">
      <style:text-properties fo:font-size="12pt" fo:font-weight="normal" officeooo:rsid="00145e82" officeooo:paragraph-rsid="00151561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27" style:family="paragraph" style:parent-style-name="Standard" style:list-style-name="L8">
      <style:text-properties fo:font-size="12pt" fo:font-weight="normal" officeooo:rsid="00198126" officeooo:paragraph-rsid="0019812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98126" officeooo:paragraph-rsid="00198126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rsid="00143700" officeooo:paragraph-rsid="00145e82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normal" officeooo:rsid="00143700" officeooo:paragraph-rsid="00145e82" style:font-size-asian="10.5pt" style:font-weight-asian="normal" style:font-size-complex="12pt" style:font-weight-complex="normal"/>
    </style:style>
    <style:style style:name="P31" style:family="paragraph" style:parent-style-name="Standard" style:list-style-name="L9">
      <style:text-properties fo:font-size="12pt" fo:font-weight="normal" officeooo:rsid="00145e82" officeooo:paragraph-rsid="00151561" style:font-size-asian="10.5pt" style:font-weight-asian="normal" style:font-size-complex="12pt" style:font-weight-complex="normal"/>
    </style:style>
    <style:style style:name="P32" style:family="paragraph" style:parent-style-name="Standard" style:list-style-name="L9">
      <style:text-properties fo:font-size="12pt" fo:font-weight="normal" officeooo:rsid="00145e82" officeooo:paragraph-rsid="00145e82" style:font-size-asian="10.5pt" style:font-weight-asian="normal" style:font-size-complex="12pt" style:font-weight-complex="normal"/>
    </style:style>
    <style:style style:name="P33" style:family="paragraph" style:parent-style-name="Standard" style:list-style-name="L9">
      <style:text-properties officeooo:paragraph-rsid="0017827d"/>
    </style:style>
    <style:style style:name="P34" style:family="paragraph" style:parent-style-name="Standard" style:list-style-name="L9">
      <style:text-properties fo:font-size="12pt" fo:font-weight="normal" officeooo:rsid="00145e82" officeooo:paragraph-rsid="0018d9f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45e82" officeooo:paragraph-rsid="0018d9f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22pt" fo:font-weight="bold" officeooo:rsid="0018d9fd" officeooo:paragraph-rsid="0018d9fd" style:font-size-asian="22pt" style:font-weight-asian="bold" style:font-size-complex="22pt" style:font-weight-complex="bold"/>
    </style:style>
    <style:style style:name="P37" style:family="paragraph" style:parent-style-name="Standard">
      <style:text-properties fo:font-size="12pt" fo:font-weight="bold" officeooo:rsid="0018d9fd" officeooo:paragraph-rsid="0018d9fd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98126" officeooo:paragraph-rsid="00198126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normal" officeooo:rsid="00198126" officeooo:paragraph-rsid="00198126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8d9fd" officeooo:paragraph-rsid="0018d9fd" style:font-size-asian="10.5pt" style:font-weight-asian="normal" style:font-size-complex="12pt" style:font-weight-complex="normal"/>
    </style:style>
    <style:style style:name="P41" style:family="paragraph" style:parent-style-name="Standard" style:list-style-name="L10">
      <style:text-properties fo:font-size="12pt" fo:font-weight="normal" officeooo:rsid="001a6bde" officeooo:paragraph-rsid="001a6bde" style:font-size-asian="10.5pt" style:font-weight-asian="normal" style:font-size-complex="12pt" style:font-weight-complex="normal"/>
    </style:style>
    <style:style style:name="P42" style:family="paragraph" style:parent-style-name="Standard" style:list-style-name="L10">
      <style:text-properties fo:font-size="12pt" fo:font-weight="normal" officeooo:rsid="00145e82" officeooo:paragraph-rsid="001a6bd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a6bde" officeooo:paragraph-rsid="001a6bd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98126" officeooo:paragraph-rsid="001a6bd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a6bde" officeooo:paragraph-rsid="001a6bde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bold" officeooo:rsid="001a6bde" officeooo:paragraph-rsid="001a6bde" fo:background-color="transparent" style:font-size-asian="10.5pt" style:font-weight-asian="bold" style:font-size-complex="12pt" style:font-weight-complex="bold"/>
    </style:style>
    <style:style style:name="P47" style:family="paragraph" style:parent-style-name="Standard">
      <style:text-properties fo:font-size="22pt" fo:font-weight="bold" officeooo:rsid="0018d9fd" officeooo:paragraph-rsid="001d6de4" style:font-size-asian="22pt" style:font-weight-asian="bold" style:font-size-complex="22pt" style:font-weight-complex="bold"/>
    </style:style>
    <style:style style:name="P48" style:family="paragraph" style:parent-style-name="Standard">
      <style:text-properties fo:font-size="12pt" fo:font-weight="bold" officeooo:rsid="00198126" officeooo:paragraph-rsid="001d6de4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normal" officeooo:rsid="001d6de4" officeooo:paragraph-rsid="001d6de4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8d9fd" officeooo:paragraph-rsid="001d6de4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98126" officeooo:paragraph-rsid="001d6de4" style:font-size-asian="10.5pt" style:font-weight-asian="normal" style:font-size-complex="12pt" style:font-weight-complex="normal"/>
    </style:style>
    <style:style style:name="P52" style:family="paragraph" style:parent-style-name="Standard" style:list-style-name="L11">
      <style:text-properties fo:font-size="12pt" fo:font-weight="normal" officeooo:rsid="001d6de4" officeooo:paragraph-rsid="001d6de4" style:font-size-asian="10.5pt" style:font-weight-asian="normal" style:font-size-complex="12pt" style:font-weight-complex="normal"/>
    </style:style>
    <style:style style:name="T1" style:family="text">
      <style:text-properties officeooo:rsid="001d6de4"/>
    </style:style>
    <style:style style:name="T2" style:family="text">
      <style:text-properties officeooo:rsid="001abd16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98126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officeooo:rsid="00145e82"/>
    </style:style>
    <style:style style:name="T7" style:family="text">
      <style:text-properties officeooo:rsid="0015156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0bd0"/>
    </style:style>
    <style:style style:name="T10" style:family="text">
      <style:text-properties fo:font-size="12pt" fo:font-weight="normal" officeooo:rsid="00145e8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7827d" style:font-size-asian="10.5pt" style:font-weight-asian="normal" style:font-size-complex="12pt" style:font-weight-complex="normal"/>
    </style:style>
    <style:style style:name="T12" style:family="text">
      <style:text-properties officeooo:rsid="001d3ab4"/>
    </style:style>
    <style:style style:name="T13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officeooo:rsid="001abd16" fo:background-color="transparent" loext:char-shading-value="0" style:font-style-asian="italic" style:font-style-complex="italic"/>
    </style:style>
    <style:style style:name="T18" style:family="text">
      <style:text-properties fo:font-style="italic" officeooo:rsid="001abd16" style:font-style-asian="italic" style:font-style-complex="italic"/>
    </style:style>
    <style:style style:name="T19" style:family="text">
      <style:text-properties fo:font-size="13pt" fo:font-style="italic" officeooo:rsid="001d6de4" style:font-size-asian="13pt" style:font-style-asian="italic" style:font-size-complex="13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</text:span> <text:span text:style-name="T1">Praktikum Peter 2026</text:span></text:p>
      <text:p text:style-name="P2"/>
      <text:p text:style-name="P3">1. Vorüberlegungen</text:p>
      <text:p text:style-name="P4"/>
      <text:p text:style-name="P5">Benutzerinteresse</text:p>
      <text:list text:style-name="L1">
        <text:list-item>
          <text:p text:style-name="P6">Welche Fragen stellen Studieninteressierte und Erstsemestler am häufigsten</text:p>
        </text:list-item>
        <text:list-item>
          <text:p text:style-name="P6">Welchen Mehrwert soll der Chatbot den Endnutzer bringen</text:p>
        </text:list-item>
        <text:list-item>
          <text:p text:style-name="P6">Wie viele Bereiche soll der Chatbot abdecken</text:p>
        </text:list-item>
      </text:list>
      <text:p text:style-name="P7"/>
      <text:p text:style-name="P5">Bibliotheken und Runtime</text:p>
      <text:list text:style-name="L2">
        <text:list-item>
          <text:p text:style-name="P8">Welche Sprachen und Runtimes nutze ich: NodeJS und Python</text:p>
        </text:list-item>
        <text:list-item>
          <text:p text:style-name="P8">Welche Bibliotheken nutze ich und brauche ich: Pytorch, Fastify etc.</text:p>
        </text:list-item>
      </text:list>
      <text:p text:style-name="P7"/>
      <text:p text:style-name="P5">IT-Sicherheit</text:p>
      <text:list text:style-name="L3">
        <text:list-item>
          <text:p text:style-name="P9">Wie sichere ich den Server vor Angreifern?</text:p>
        </text:list-item>
        <text:list-item>
          <text:p text:style-name="P9">Wie schütze ich den Chatbot und Nutzer vor Prompt-Injection?</text:p>
        </text:list-item>
        <text:list-item>
          <text:p text:style-name="P9">Wie viele Freiheiten gebe ich den Nutzer?</text:p>
        </text:list-item>
        <text:list-item>
          <text:p text:style-name="P10">Gibt es eine langzeitarchivierte Chathistory und wenn ja wo speichere ich sie? </text:p>
        </text:list-item>
      </text:list>
      <text:p text:style-name="P11"/>
      <text:p text:style-name="P12">Hosting bzw. Serverbetrieb</text:p>
      <text:list text:style-name="L4">
        <text:list-item>
          <text:p text:style-name="P13">Wo soll der Chatbot verfügbar sein (Internet oder HTWK-eigenes Intranet)?</text:p>
        </text:list-item>
        <text:list-item>
          <text:p text:style-name="P13">Auf welchen Server läuft der Chatbot</text:p>
        </text:list-item>
        <text:list-item>
          <text:p text:style-name="P13">Wie viele Ressourcen stehen dem Betrieb zur Verfügung</text:p>
        </text:list-item>
      </text:list>
      <text:p text:style-name="P11"/>
      <text:p text:style-name="P12">Rechtliches und Lizenzen</text:p>
      <text:list text:style-name="L5">
        <text:list-item>
          <text:p text:style-name="P14">Unter welchen Rechten läuft die Nutzung des gewählten Modells (welche Lizenzen)?</text:p>
        </text:list-item>
        <text:list-item>
          <text:p text:style-name="P14">Unter welchen Rechten läuft die Nutzung von Trainingsdaten (welche Lizenzen)?</text:p>
        </text:list-item>
      </text:list>
      <text:p text:style-name="P11"/>
      <text:p text:style-name="P12">→ <text:span text:style-name="T1">Basism</text:span>odellauswahl</text:p>
      <text:list text:style-name="L6">
        <text:list-item>
          <text:p text:style-name="P15">Welches Modell eignet sich gut für alle Anforderungen <text:span text:style-name="T1">als Basismodell</text:span>?</text:p>
        </text:list-item>
        <text:list-item>
          <text:p text:style-name="P15">Wie leistungsstark ist das betrachtete Modell?</text:p>
        </text:list-item>
        <text:list-item>
          <text:p text:style-name="P15">Wie gut liegt das betrachtete Modell im Ranking gegenüber anderen?</text:p>
        </text:list-item>
        <text:list-item>
          <text:p text:style-name="P15">Wie viele Parameter hat es und welche Hardwareanforderungen sind benötigt?</text:p>
        </text:list-item>
      </text:list>
      <text:p text:style-name="P11"/>
      <text:p text:style-name="P16">Aufwand und Risiken</text:p>
      <text:list text:style-name="L7">
        <text:list-item>
          <text:p text:style-name="P17">Wie viel Aufwand bringt die Planung?</text:p>
        </text:list-item>
        <text:list-item>
          <text:p text:style-name="P17">Wie viel Aufwand bringt das Finetuning?</text:p>
        </text:list-item>
        <text:list-item>
          <text:p text:style-name="P17">Wie viel Aufwand bringt das Hosting und die Infrastruktur?</text:p>
        </text:list-item>
        <text:list-item>
          <text:p text:style-name="P17">Wie viel Aufwand bringt die Instandhaltung</text:p>
        </text:list-item>
        <text:list-item>
          <text:p text:style-name="P18">Welche potentiellen Risiken gehen mit dem Plan einher?</text:p>
        </text:list-item>
      </text:list>
      <text:p text:style-name="P19"/>
      <text:p text:style-name="P19"/>
      <text:p text:style-name="P19"><text:soft-page-break/></text:p>
      <text:p text:style-name="P19"><text:span text:style-name="T2">2</text:span>. Datagrapping</text:p>
      <text:p text:style-name="P20"/>
      <text:p text:style-name="P21"><text:span text:style-name="T3">Ziel</text:span>:</text:p>
      <text:p text:style-name="P21">Das Erlernen von genauen Informationen zur der HTWK Leipzig.</text:p>
      <text:p text:style-name="P21"/>
      <text:p text:style-name="P2"/>
      <text:p text:style-name="P22"><text:span text:style-name="T4">Möglichkeit</text:span> 1 (Reines Finetuning):</text:p>
      <text:p text:style-name="P20"/>
      <text:p text:style-name="P23"><text:span text:style-name="T5">Übersicht</text:span>:</text:p>
      <text:p text:style-name="P23">Ansammeln von DS-Dat<text:span text:style-name="T6">en</text:span> (Domain Specific bzw. HTWK Daten) und das Umwandeln <text:span text:style-name="T6">derer in Chat-Templates durch ein lokales Modell.</text:span></text:p>
      <text:p text:style-name="P23"/>
      <text:p text:style-name="P24"><text:span text:style-name="T5">Ablauf</text:span>:</text:p>
      <text:list text:style-name="L8">
        <text:list-item>
          <text:p text:style-name="P25">Sammeln von HT<text:span text:style-name="T7">WK</text:span>-spezifischen Daten <text:span text:style-name="T7">(Vorlesungen etc.)</text:span></text:p>
        </text:list-item>
        <text:list-item>
          <text:p text:style-name="P26">Semantische Aufteilung dieser Daten</text:p>
        </text:list-item>
        <text:list-item>
          <text:p text:style-name="P26">Generierung von Trainingsdaten im Chat-Template Format durch ein lokales Modell</text:p>
        </text:list-item>
        <text:list-item>
          <text:p text:style-name="P26">Überfliegen der Trainingsdaten durch eine Person bzw. ein lokales Modell (→ evtl. Verbesserung)</text:p>
        </text:list-item>
        <text:list-item>
          <text:p text:style-name="P26">Splitten der Trainingsdaten in Trainings- und Validierungsdaten</text:p>
        </text:list-item>
        <text:list-item>
          <text:p text:style-name="P27">Finetining</text:p>
        </text:list-item>
      </text:list>
      <text:p text:style-name="P28"/>
      <text:p text:style-name="P28"><text:span text:style-name="T5">Produkt</text:span>:</text:p>
      <text:p text:style-name="P28">Modell <text:span text:style-name="T8">Version 0.1.0</text:span> mir spezifischen Daten in den Gewichten des Modells</text:p>
      <text:p text:style-name="P24"/>
      <text:p text:style-name="P24"/>
      <text:p text:style-name="P24"/>
      <text:p text:style-name="P24"/>
      <text:p text:style-name="P22"><text:span text:style-name="T4">Möglichkeit</text:span> 2 (Vektordatenbank):</text:p>
      <text:p text:style-name="P29"/>
      <text:p text:style-name="P30"><text:span text:style-name="T5">Übersicht</text:span>:</text:p>
      <text:p text:style-name="P30">Ansammeln von DS-Dat<text:span text:style-name="T6">en</text:span> (Domain Specific bzw. HTWK Daten) <text:span text:style-name="T9">und das erstellen einer Vektordatenbank mithilfe eines lokalen Modells</text:span><text:span text:style-name="T6">.</text:span></text:p>
      <text:p text:style-name="P30"/>
      <text:p text:style-name="P24"><text:span text:style-name="T5">Ablauf</text:span>:</text:p>
      <text:list text:style-name="L9">
        <text:list-item>
          <text:p text:style-name="P31">Sammeln von HT<text:span text:style-name="T7">WK</text:span>-spezifischen Daten <text:span text:style-name="T7">(Vorlesungen etc.)</text:span></text:p>
        </text:list-item>
        <text:list-item>
          <text:p text:style-name="P32">Semantische Aufteilung dieser Daten</text:p>
        </text:list-item>
        <text:list-item>
          <text:p text:style-name="P33"><text:span text:style-name="T10">Generierung </text:span><text:span text:style-name="T11">einer Vektordatenbank</text:span><text:span text:style-name="T10"> durch ein lokales Modell </text:span><text:span text:style-name="T11">(z.B. </text:span>bge-m3<text:span text:style-name="T11">)</text:span></text:p>
        </text:list-item>
        <text:list-item>
          <text:p text:style-name="P34">Splitten der Trainingsdaten in Trainings- und Validierungsdaten</text:p>
        </text:list-item>
      </text:list>
      <text:p text:style-name="P35"/>
      <text:p text:style-name="P28"><text:span text:style-name="T5">Produkt</text:span>:</text:p>
      <text:p text:style-name="P28">Vektordatenbank mit spezifischen Daten</text:p>
      <text:p text:style-name="P36"/>
      <text:p text:style-name="P36"/>
      <text:p text:style-name="P36"/>
      <text:p text:style-name="P36"><text:soft-page-break/></text:p>
      <text:p text:style-name="P36"><text:span text:style-name="T12">3</text:span>. Schreiben von Chat-Templates</text:p>
      <text:p text:style-name="P37"/>
      <text:p text:style-name="P38"><text:span text:style-name="T13">Ziel</text:span>:</text:p>
      <text:p text:style-name="P39">Das Erlernen der richtigen Form der Antwort und dem richtigen Umgang bzw. Ausdruck mit dem Nutzer.</text:p>
      <text:p text:style-name="P37"/>
      <text:p text:style-name="P40"><text:span text:style-name="T5">Übersicht</text:span>:</text:p>
      <text:p text:style-name="P40">Das manuelle Schreiben von Trainingsdaten im Chat-Template Format.</text:p>
      <text:p text:style-name="P40"/>
      <text:p text:style-name="P39"><text:span text:style-name="T5">Ablauf</text:span>:</text:p>
      <text:list text:style-name="L10">
        <text:list-item>
          <text:p text:style-name="P41">Definierung der Eigenschaften des Chatbots</text:p>
        </text:list-item>
        <text:list-item>
          <text:p text:style-name="P41">Auf <text:span text:style-name="T14">Schritt 1.</text:span> Basierende Planung der Reihenfolge (nach dem Prinzip wichtigstes zuerst und zuletzt)</text:p>
        </text:list-item>
        <text:list-item>
          <text:p text:style-name="P41">Schreiben der Trainingsdaten</text:p>
        </text:list-item>
        <text:list-item>
          <text:p text:style-name="P42">Splitten der Trainingsdaten in Trainings- und Validierungsdaten</text:p>
        </text:list-item>
        <text:list-item>
          <text:p text:style-name="P41">Finetuning des KI-Modells (<text:span text:style-name="T15">Version </text:span><text:span text:style-name="T16">[</text:span><text:span text:style-name="T17">2</text:span><text:span text:style-name="T16">.1]</text:span><text:span text:style-name="T15"> 0.1.0 </text:span><text:span text:style-name="T16">[</text:span><text:span text:style-name="T17">2</text:span><text:span text:style-name="T16">.2]</text:span><text:span text:style-name="T15"> 0.0.0</text:span>) in eventueller Beachtung der Vektordatenbank abhängig von <text:span text:style-name="T1">2</text:span>.x</text:p>
        </text:list-item>
      </text:list>
      <text:p text:style-name="P43"/>
      <text:p text:style-name="P44"><text:span text:style-name="T5">Produkt</text:span>:</text:p>
      <text:p text:style-name="P45">Modell <text:span text:style-name="T8">Version </text:span><text:span text:style-name="T14">[</text:span><text:span text:style-name="T18">2</text:span><text:span text:style-name="T14">.1]</text:span><text:span text:style-name="T8"> 0.2.0 </text:span><text:span text:style-name="T14">[</text:span><text:span text:style-name="T18">2</text:span><text:span text:style-name="T14">.2]</text:span><text:span text:style-name="T8"> 0.1.0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pan text:style-name="T1">4</text:span>. <text:span text:style-name="T1">Präsentation</text:span></text:p>
      <text:p text:style-name="P48"><text:span text:style-name="T13">Ziel</text:span>:</text:p>
      <text:p text:style-name="P49">Das Präsentieren meiner Ziele, Arbeitsweise und Ergebnisse, sowie das Einführen in das KI-Finetuning</text:p>
      <text:p text:style-name="P50"/>
      <text:p text:style-name="P51"><text:span text:style-name="T19">Mindestbenötigter Inhalt</text:span>:</text:p>
      <text:list text:style-name="L11">
        <text:list-item>
          <text:p text:style-name="P52">Mein Ziel</text:p>
        </text:list-item>
        <text:list-item>
          <text:p text:style-name="P52">Meine Arbeitsweise</text:p>
        </text:list-item>
        <text:list-item>
          <text:p text:style-name="P52">Meine Probleme und deren Lösungen</text:p>
        </text:list-item>
        <text:list-item>
          <text:p text:style-name="P52">Das Ergebnis</text:p>
        </text:list-item>
        <text:list-item>
          <text:p text:style-name="P52">Wie funktioniert ein Transformermodell bzw. Chatbot grundsätzlich</text:p>
        </text:list-item>
        <text:list-item>
          <text:p text:style-name="P52">Wie funktioniert das KI-Training</text:p>
        </text:list-item>
        <text:list-item>
          <text:p text:style-name="P52">Wie kann man es weiterentwickeln - Zukunftsausblick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2T10:28:12.540668100</meta:creation-date>
    <meta:generator>LibreOffice/25.8.3.2$Windows_X86_64 LibreOffice_project/8ca8d55c161d602844f5428fa4b58097424e324e</meta:generator>
    <dc:date>2026-06-22T12:01:06.384430400</dc:date>
    <meta:editing-duration>PT25M9S</meta:editing-duration>
    <meta:editing-cycles>8</meta:editing-cycles>
    <meta:document-statistic meta:table-count="0" meta:image-count="0" meta:object-count="0" meta:page-count="3" meta:paragraph-count="81" meta:word-count="532" meta:character-count="3670" meta:non-whitespace-character-count="3263"/>
  </office:meta>
</office:document-meta>
</file>