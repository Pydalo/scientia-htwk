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E0000030A4AEDAA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Courier New" svg:font-family="'Courier New'"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elle1" style:family="table">
      <style:table-properties style:width="16.986cm" fo:margin-left="0cm" table:align="left"/>
    </style:style>
    <style:style style:name="Tabelle1.A" style:family="table-column">
      <style:table-column-properties style:column-width="5.662cm"/>
    </style:style>
    <style:style style:name="Tabelle1.1" style:family="table-row">
      <style:table-row-properties style:min-row-height="0.529cm"/>
    </style:style>
    <style:style style:name="Tabelle1.A1" style:family="table-cell">
      <style:table-cell-properties fo:padding-left="0.191cm" fo:padding-right="0.191cm" fo:padding-top="0cm" fo:padding-bottom="0cm" fo:border-left="none" fo:border-right="none" fo:border-top="0.5pt solid #7f7f7f" fo:border-bottom="0.5pt solid #7f7f7f" style:writing-mode="lr-tb"/>
    </style:style>
    <style:style style:name="Tabelle1.A2" style:family="table-cell">
      <style:table-cell-properties fo:padding-left="0.191cm" fo:padding-right="0.191cm" fo:padding-top="0cm" fo:padding-bottom="0cm" fo:border="none" style:writing-mode="lr-tb"/>
    </style:style>
    <style:style style:name="Tabelle1.A4" style:family="table-cell">
      <style:table-cell-properties fo:padding-left="0.191cm" fo:padding-right="0.191cm" fo:padding-top="0cm" fo:padding-bottom="0cm" fo:border-left="none" fo:border-right="none" fo:border-top="none" fo:border-bottom="0.5pt solid #7f7f7f" style:writing-mode="lr-tb"/>
    </style:style>
    <style:style style:name="Tabelle2" style:family="table">
      <style:table-properties style:width="17cm" fo:margin-left="0cm" table:align="left"/>
    </style:style>
    <style:style style:name="Tabelle2.A" style:family="table-column">
      <style:table-column-properties style:column-width="3.621cm"/>
    </style:style>
    <style:style style:name="Tabelle2.B" style:family="table-column">
      <style:table-column-properties style:column-width="1.707cm"/>
    </style:style>
    <style:style style:name="Tabelle2.C" style:family="table-column">
      <style:table-column-properties style:column-width="5.348cm"/>
    </style:style>
    <style:style style:name="Tabelle2.D" style:family="table-column">
      <style:table-column-properties style:column-width="6.324cm"/>
    </style:style>
    <style:style style:name="Tabelle2.1" style:family="table-row">
      <style:table-row-properties style:min-row-height="0.529cm"/>
    </style:style>
    <style:style style:name="Tabelle2.A1" style:family="table-cell">
      <style:table-cell-properties fo:padding-left="0.191cm" fo:padding-right="0.191cm" fo:padding-top="0cm" fo:padding-bottom="0cm" fo:border-left="none" fo:border-right="none" fo:border-top="0.5pt solid #7f7f7f" fo:border-bottom="none" style:writing-mode="lr-tb"/>
    </style:style>
    <style:style style:name="Tabelle2.A2" style:family="table-cell">
      <style:table-cell-properties fo:padding-left="0.191cm" fo:padding-right="0.191cm" fo:padding-top="0cm" fo:padding-bottom="0cm" fo:border="none" style:writing-mode="lr-tb"/>
    </style:style>
    <style:style style:name="Tabelle2.A3" style:family="table-cell">
      <style:table-cell-properties fo:padding-left="0.191cm" fo:padding-right="0.191cm" fo:padding-top="0cm" fo:padding-bottom="0cm" fo:border-left="none" fo:border-right="none" fo:border-top="none" fo:border-bottom="0.5pt solid #7f7f7f" style:writing-mode="lr-tb"/>
    </style:style>
    <style:style style:name="Tabelle3" style:family="table">
      <style:table-properties style:width="17cm" fo:margin-left="0cm" table:align="left"/>
    </style:style>
    <style:style style:name="Tabelle3.A" style:family="table-column">
      <style:table-column-properties style:column-width="2.93cm"/>
    </style:style>
    <style:style style:name="Tabelle3.B" style:family="table-column">
      <style:table-column-properties style:column-width="1.632cm"/>
    </style:style>
    <style:style style:name="Tabelle3.C" style:family="table-column">
      <style:table-column-properties style:column-width="6.115cm"/>
    </style:style>
    <style:style style:name="Tabelle3.D" style:family="table-column">
      <style:table-column-properties style:column-width="6.324cm"/>
    </style:style>
    <style:style style:name="Tabelle3.1" style:family="table-row">
      <style:table-row-properties style:min-row-height="0.529cm"/>
    </style:style>
    <style:style style:name="Tabelle3.A1" style:family="table-cell">
      <style:table-cell-properties fo:padding-left="0.191cm" fo:padding-right="0.191cm" fo:padding-top="0cm" fo:padding-bottom="0cm" fo:border-left="none" fo:border-right="none" fo:border-top="0.5pt solid #7f7f7f" fo:border-bottom="none" style:writing-mode="lr-tb"/>
    </style:style>
    <style:style style:name="Tabelle3.A2" style:family="table-cell">
      <style:table-cell-properties fo:padding-left="0.191cm" fo:padding-right="0.191cm" fo:padding-top="0cm" fo:padding-bottom="0cm" fo:border="none" style:writing-mode="lr-tb"/>
    </style:style>
    <style:style style:name="Tabelle3.3" style:family="table-row">
      <style:table-row-properties style:min-row-height="2.196cm"/>
    </style:style>
    <style:style style:name="Tabelle3.A6" style:family="table-cell">
      <style:table-cell-properties fo:padding-left="0.191cm" fo:padding-right="0.191cm" fo:padding-top="0cm" fo:padding-bottom="0cm" fo:border-left="none" fo:border-right="none" fo:border-top="none" fo:border-bottom="0.5pt solid #7f7f7f" style:writing-mode="lr-tb"/>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097cm" fo:border-left="0.5pt solid #000000" fo:border-right="none" fo:border-top="0.5pt solid #000000" fo:border-bottom="0.5pt solid #000000"/>
    </style:style>
    <style:style style:name="Tabelle4.C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C2" style:family="table-cell">
      <style:table-cell-properties fo:padding="0.097cm" fo:border-left="0.5pt solid #000000" fo:border-right="0.5pt solid #000000" fo:border-top="none" fo:border-bottom="0.5pt solid #000000"/>
    </style:style>
    <style:style style:name="Tabelle4.4" style:family="table-row">
      <style:table-row-properties style:min-row-height="0.612cm"/>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A1" style:family="table-cell">
      <style:table-cell-properties fo:padding="0.097cm" fo:border-left="0.5pt solid #000000" fo:border-right="none" fo:border-top="0.5pt solid #000000" fo:border-bottom="0.5pt solid #000000"/>
    </style:style>
    <style:style style:name="Tabelle5.B1" style:family="table-cell">
      <style:table-cell-properties fo:padding="0.097cm" fo:border="0.5pt solid #000000"/>
    </style:style>
    <style:style style:name="Tabelle5.2" style:family="table-row">
      <style:table-row-properties style:min-row-height="1.427cm"/>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style:page-number="auto" fo:break-before="page"/>
      <style:text-properties fo:font-size="36pt" style:text-underline-style="solid" style:text-underline-width="auto" style:text-underline-color="font-color" fo:font-weight="bold" style:text-underline-mode="continuous" style:text-overline-mode="continuous" style:text-line-through-mode="continuous" style:font-size-asian="36pt" style:font-weight-asian="bold" style:font-size-complex="36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ize="22pt" fo:font-weight="bold" style:font-size-asian="22pt" style:font-weight-asian="bold" style:font-size-complex="22pt" style:font-weight-complex="bold"/>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Standard" style:list-style-name="L1">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Listenabsatz" style:list-style-name="L2"/>
    <style:style style:name="P7" style:family="paragraph" style:parent-style-name="Standard">
      <style:paragraph-properties fo:margin-left="1.27cm">
        <style:tab-stops/>
      </style:paragraph-properties>
    </style:style>
    <style:style style:name="P8" style:family="paragraph" style:parent-style-name="Standard" style:list-style-name="L1"/>
    <style:style style:name="P9" style:family="paragraph" style:parent-style-name="Listenabsatz" style:list-style-name="L3"/>
    <style:style style:name="P10" style:family="paragraph" style:parent-style-name="Standard">
      <style:text-properties fo:color="#b2b2b2" loext:opacity="100%" fo:font-size="20pt" fo:font-style="italic" fo:font-weight="bold" style:font-size-asian="20pt" style:font-style-asian="italic" style:font-weight-asian="bold" style:font-size-complex="20pt" style:font-style-complex="italic" style:font-weight-complex="bold"/>
    </style:style>
    <style:style style:name="P11" style:family="paragraph" style:parent-style-name="Standard" style:list-style-name="L4">
      <style:text-properties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left="1.27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margin-left="1.27cm" fo:line-height="106%">
        <style:tab-stops/>
      </style:paragraph-properties>
    </style:style>
    <style:style style:name="P15" style:family="paragraph" style:parent-style-name="Standard">
      <style:paragraph-properties fo:line-height="106%"/>
    </style:style>
    <style:style style:name="P16" style:family="paragraph" style:parent-style-name="Standard">
      <style:paragraph-properties fo:margin-left="1.251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7" style:family="paragraph" style:parent-style-name="Listenabsatz" style:list-style-name="L5">
      <style:text-properties fo:font-size="14pt" fo:font-style="italic" fo:font-weight="bold" style:font-size-asian="14pt" style:font-style-asian="italic" style:font-weight-asian="bold" style:font-size-complex="14pt" style:font-style-complex="italic" style:font-weight-complex="bold"/>
    </style:style>
    <style:style style:name="P18"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Standard">
      <style:paragraph-properties fo:line-height="106%"/>
      <style:text-properties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margin-left="1.905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21" style:family="paragraph" style:parent-style-name="Standard" style:list-style-name="L6">
      <style:text-properties fo:font-size="14pt" fo:font-style="italic" fo:font-weight="bold" style:font-size-asian="14pt" style:font-style-asian="italic" style:font-weight-asian="bold" style:font-size-complex="14pt" style:font-style-complex="italic" style:font-weight-complex="bold"/>
    </style:style>
    <style:style style:name="P22" style:family="paragraph" style:parent-style-name="Standard" style:list-style-name="L6"/>
    <style:style style:name="P23" style:family="paragraph" style:parent-style-name="Standard" style:list-style-name="L6">
      <style:text-properties fo:font-size="11pt" fo:font-style="normal" fo:font-weight="normal" style:font-size-asian="9.60000038146973pt" style:font-style-asian="normal" style:font-weight-asian="normal" style:font-size-complex="11pt" style:font-style-complex="normal" style:font-weight-complex="normal"/>
    </style:style>
    <style:style style:name="P24" style:family="paragraph" style:parent-style-name="Standard" style:list-style-name="L6">
      <style:text-properties fo:font-size="11pt" fo:font-style="normal" fo:font-weight="normal" officeooo:paragraph-rsid="000e9ecf" style:font-size-asian="9.60000038146973pt" style:font-style-asian="normal" style:font-weight-asian="normal" style:font-size-complex="11pt" style:font-style-complex="normal" style:font-weight-complex="normal"/>
    </style:style>
    <style:style style:name="P25" style:family="paragraph" style:parent-style-name="Standard" style:list-style-name="L6">
      <style:text-properties fo:font-size="14pt" fo:font-style="italic" fo:font-weight="bold" officeooo:paragraph-rsid="000e9ecf" style:font-size-asian="14pt" style:font-style-asian="italic" style:font-weight-asian="bold" style:font-size-complex="14pt" style:font-style-complex="italic" style:font-weight-complex="bold"/>
    </style:style>
    <style:style style:name="P26" style:family="paragraph" style:parent-style-name="Standard" style:list-style-name="L6">
      <style:text-properties fo:font-size="11pt" fo:font-style="normal" fo:font-weight="normal" officeooo:rsid="000e9ecf" officeooo:paragraph-rsid="0010588b" style:font-size-asian="9.60000038146973pt" style:font-style-asian="normal" style:font-weight-asian="normal" style:font-size-complex="11pt" style:font-style-complex="normal" style:font-weight-complex="normal"/>
    </style:style>
    <style:style style:name="P27" style:family="paragraph" style:parent-style-name="Standard" style:list-style-name="L7"/>
    <style:style style:name="P28" style:family="paragraph" style:parent-style-name="Standard" style:list-style-name="L7">
      <style:text-properties officeooo:paragraph-rsid="0010588b"/>
    </style:style>
    <style:style style:name="P29" style:family="paragraph" style:parent-style-name="Standard" style:list-style-name="L8"/>
    <style:style style:name="P30" style:family="paragraph" style:parent-style-name="Standard" style:list-style-name="L8">
      <style:text-properties officeooo:paragraph-rsid="0010588b"/>
    </style:style>
    <style:style style:name="P31" style:family="paragraph" style:parent-style-name="Standard" style:list-style-name="L9"/>
    <style:style style:name="P32" style:family="paragraph" style:parent-style-name="Standard">
      <style:text-properties officeooo:paragraph-rsid="0010588b"/>
    </style:style>
    <style:style style:name="P33" style:family="paragraph" style:parent-style-name="Standard" style:list-style-name="L9">
      <style:text-properties officeooo:rsid="0011c23d" officeooo:paragraph-rsid="0011c23d"/>
    </style:style>
    <style:style style:name="P34" style:family="paragraph" style:parent-style-name="Standard" style:list-style-name="L9">
      <style:text-properties officeooo:paragraph-rsid="0011c23d"/>
    </style:style>
    <style:style style:name="P35" style:family="paragraph" style:parent-style-name="Standard">
      <style:text-properties officeooo:paragraph-rsid="0011c23d"/>
    </style:style>
    <style:style style:name="P36" style:family="paragraph" style:parent-style-name="Table_20_Contents">
      <style:text-properties fo:font-weight="bold" officeooo:rsid="0011c23d" officeooo:paragraph-rsid="0011c23d" style:font-weight-asian="bold" style:font-weight-complex="bold"/>
    </style:style>
    <style:style style:name="P37" style:family="paragraph" style:parent-style-name="Table_20_Contents">
      <style:text-properties officeooo:rsid="0011c23d" officeooo:paragraph-rsid="0011c23d"/>
    </style:style>
    <style:style style:name="P38" style:family="paragraph" style:parent-style-name="Standard">
      <style:text-properties officeooo:rsid="0011f5fe" officeooo:paragraph-rsid="0011f5fe"/>
    </style:style>
    <style:style style:name="P39" style:family="paragraph" style:parent-style-name="Standard" style:list-style-name="L10"/>
    <style:style style:name="P40" style:family="paragraph" style:parent-style-name="Standard" style:list-style-name="L10">
      <style:text-properties officeooo:rsid="0011f5fe" officeooo:paragraph-rsid="0011f5fe"/>
    </style:style>
    <style:style style:name="P41" style:family="paragraph" style:parent-style-name="Standard">
      <style:text-properties fo:font-size="22pt" fo:font-style="italic" fo:font-weight="bold" style:font-size-asian="22pt" style:font-style-asian="italic" style:font-weight-asian="bold" style:font-size-complex="22pt" style:font-style-complex="italic" style:font-weight-complex="bold"/>
    </style:style>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3"/>
    <style:style style:name="P45" style:family="paragraph" style:parent-style-name="Standard">
      <style:text-properties officeooo:paragraph-rsid="00146432"/>
    </style:style>
    <style:style style:name="P46" style:family="paragraph" style:parent-style-name="Standard">
      <style:text-properties officeooo:rsid="00146432" officeooo:paragraph-rsid="00146432"/>
    </style:style>
    <style:style style:name="P47" style:family="paragraph" style:parent-style-name="Standard">
      <loext:graphic-properties draw:fill="solid" draw:fill-color="#191a1c"/>
      <style:paragraph-properties fo:background-color="#191a1c" fo:padding="0cm" fo:border="none" style:shadow="none"/>
      <style:text-properties fo:font-size="14pt" officeooo:paragraph-rsid="00146432" style:font-size-asian="14pt" style:font-size-complex="14pt"/>
    </style:style>
    <style:style style:name="P48"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4pt" fo:font-style="normal" fo:font-weight="normal" officeooo:paragraph-rsid="00152d81" style:font-size-asian="14pt" style:font-style-asian="normal" style:font-weight-asian="normal" style:font-size-complex="14pt"/>
    </style:style>
    <style:style style:name="P49" style:family="paragraph" style:parent-style-name="Standard">
      <style:text-properties officeooo:rsid="00152d81" officeooo:paragraph-rsid="00152d81"/>
    </style:style>
    <style:style style:name="P50" style:family="paragraph" style:parent-style-name="Standard">
      <style:text-properties fo:font-size="22pt" fo:font-weight="bold" officeooo:paragraph-rsid="0016130c" style:font-size-asian="22pt" style:font-weight-asian="bold" style:font-size-complex="22pt" style:font-weight-complex="bold"/>
    </style:style>
    <style:style style:name="P51" style:family="paragraph" style:parent-style-name="Standard">
      <style:text-properties officeooo:paragraph-rsid="0016130c"/>
    </style:style>
    <style:style style:name="P52" style:family="paragraph" style:parent-style-name="Standard">
      <style:text-properties officeooo:paragraph-rsid="00171a9e"/>
    </style:style>
    <style:style style:name="P53" style:family="paragraph" style:parent-style-name="Standard">
      <style:text-properties officeooo:paragraph-rsid="001a588a"/>
    </style:style>
    <style:style style:name="P54" style:family="paragraph" style:parent-style-name="Standard">
      <style:text-properties fo:font-size="11pt" fo:font-weight="normal" officeooo:rsid="001a588a" officeooo:paragraph-rsid="001a588a" style:font-size-asian="9.60000038146973pt" style:font-weight-asian="normal" style:font-size-complex="11pt" style:font-weight-complex="normal"/>
    </style:style>
    <style:style style:name="P55" style:family="paragraph" style:parent-style-name="Standard">
      <style:paragraph-properties fo:text-align="center" style:justify-single-word="false"/>
      <style:text-properties fo:font-size="11pt" fo:font-weight="normal" officeooo:rsid="001a78c6" officeooo:paragraph-rsid="001a78c6" style:font-size-asian="9.60000038146973pt" style:font-weight-asian="normal" style:font-size-complex="11pt" style:font-weight-complex="normal"/>
    </style:style>
    <style:style style:name="P56" style:family="paragraph" style:parent-style-name="Standard">
      <style:paragraph-properties fo:text-align="center" style:justify-single-word="false"/>
      <style:text-properties fo:font-size="11pt" fo:font-weight="normal" officeooo:rsid="001aa689" officeooo:paragraph-rsid="001aa689" style:font-size-asian="9.60000038146973pt" style:font-weight-asian="normal" style:font-size-complex="11pt" style:font-weight-complex="normal"/>
    </style:style>
    <style:style style:name="P57" style:family="paragraph" style:parent-style-name="Standard">
      <style:paragraph-properties fo:text-align="center" style:justify-single-word="false"/>
      <style:text-properties fo:font-size="11pt" fo:font-weight="normal" officeooo:rsid="001b966c" officeooo:paragraph-rsid="001b966c" style:font-size-asian="9.60000038146973pt" style:font-weight-asian="normal" style:font-size-complex="11pt" style:font-weight-complex="normal"/>
    </style:style>
    <style:style style:name="P58" style:family="paragraph" style:parent-style-name="Standard">
      <style:paragraph-properties fo:text-align="center" style:justify-single-word="false"/>
      <style:text-properties fo:font-size="11pt" fo:font-weight="normal" officeooo:rsid="001d590e" officeooo:paragraph-rsid="001d590e" style:font-size-asian="9.60000038146973pt" style:font-weight-asian="normal" style:font-size-complex="11pt" style:font-weight-complex="normal"/>
    </style:style>
    <style:style style:name="P59" style:family="paragraph" style:parent-style-name="Table_20_Contents">
      <style:paragraph-properties fo:text-align="start" style:justify-single-word="false"/>
      <style:text-properties fo:font-size="11pt" officeooo:rsid="001d590e" officeooo:paragraph-rsid="001d590e" style:font-size-asian="9.60000038146973pt" style:font-size-complex="11pt"/>
    </style:style>
    <style:style style:name="P60" style:family="paragraph" style:parent-style-name="Table_20_Contents">
      <style:paragraph-properties fo:text-align="start" style:justify-single-word="false"/>
      <style:text-properties fo:font-size="11pt" style:font-size-asian="9.60000038146973pt" style:font-size-complex="11pt"/>
    </style:style>
    <style:style style:name="P61" style:family="paragraph" style:parent-style-name="Standard">
      <style:paragraph-properties fo:text-align="start" style:justify-single-word="false"/>
      <style:text-properties fo:font-size="11pt" fo:font-weight="normal" officeooo:rsid="001d590e" officeooo:paragraph-rsid="001d590e" style:font-size-asian="9.60000038146973pt" style:font-weight-asian="normal" style:font-size-complex="11pt" style:font-weight-complex="normal"/>
    </style:style>
    <style:style style:name="P62" style:family="paragraph" style:parent-style-name="Standard">
      <style:paragraph-properties fo:text-align="start" style:justify-single-word="false"/>
      <style:text-properties fo:font-size="11pt" fo:font-weight="normal" officeooo:rsid="001b966c" officeooo:paragraph-rsid="001b966c" style:font-size-asian="9.60000038146973pt" style:font-weight-asian="normal" style:font-size-complex="11pt" style:font-weight-complex="normal"/>
    </style:style>
    <style:style style:name="P63" style:family="paragraph" style:parent-style-name="Standard">
      <style:text-properties officeooo:paragraph-rsid="001ca14e"/>
    </style:style>
    <style:style style:name="P64" style:family="paragraph" style:parent-style-name="Standard">
      <style:text-properties officeooo:paragraph-rsid="00224c09"/>
    </style:style>
    <style:style style:name="P65" style:family="paragraph" style:parent-style-name="Standard">
      <style:paragraph-properties fo:text-align="center" style:justify-single-word="false"/>
      <style:text-properties officeooo:paragraph-rsid="001d8092"/>
    </style:style>
    <style:style style:name="P66" style:family="paragraph" style:parent-style-name="Standard">
      <style:text-properties officeooo:paragraph-rsid="001d590e"/>
    </style:style>
    <style:style style:name="P67" style:family="paragraph" style:parent-style-name="Standard">
      <style:text-properties fo:font-size="11pt" fo:font-weight="normal" officeooo:rsid="00224c09" officeooo:paragraph-rsid="00224c09" style:font-size-asian="9.60000038146973pt" style:font-weight-asian="normal" style:font-size-complex="11pt" style:font-weight-complex="normal"/>
    </style:style>
    <style:style style:name="P68" style:family="paragraph" style:parent-style-name="Text_20_body">
      <style:paragraph-properties fo:text-align="center" style:justify-single-word="false"/>
      <style:text-properties fo:font-variant="normal" fo:text-transform="none" fo:color="#000000" loext:opacity="100%" fo:font-size="11pt" fo:font-style="normal" fo:font-weight="normal" officeooo:rsid="00224c09" officeooo:paragraph-rsid="00224c09" style:font-size-asian="9.60000038146973pt" style:font-weight-asian="normal" style:font-size-complex="11pt" style:font-weight-complex="normal"/>
    </style:style>
    <style:style style:name="P69"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text-properties fo:font-variant="normal" fo:text-transform="none" fo:color="#000000" loext:opacity="100%" fo:font-size="11pt" fo:font-style="normal" officeooo:rsid="00224c09" style:font-size-asian="9.60000038146973pt" style:font-size-complex="11pt"/>
    </style:style>
    <style:style style:name="P70"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fo:font-variant="normal" fo:text-transform="none" fo:color="#000000" loext:opacity="100%" fo:font-size="11pt" fo:font-style="normal" officeooo:rsid="00224c09" style:font-size-asian="9.60000038146973pt" style:font-size-complex="11pt"/>
    </style:style>
    <style:style style:name="P71" style:family="paragraph" style:parent-style-name="Liste">
      <style:text-properties officeooo:rsid="0024a21c" officeooo:paragraph-rsid="0024a21c"/>
    </style:style>
    <style:style style:name="P72" style:family="paragraph" style:parent-style-name="Standard">
      <style:paragraph-properties fo:text-align="center" style:justify-single-word="false"/>
      <style:text-properties officeooo:paragraph-rsid="0024a21c"/>
    </style:style>
    <style:style style:name="P73" style:family="paragraph" style:parent-style-name="Standard" style:list-style-name="L14"/>
    <style:style style:name="P74" style:family="paragraph" style:parent-style-name="Standard">
      <style:text-properties fo:font-size="22pt" fo:font-weight="bold" officeooo:paragraph-rsid="001d590e" style:font-size-asian="22pt" style:font-weight-asian="bold" style:font-size-complex="22pt" style:font-weight-complex="bold"/>
    </style:style>
    <style:style style:name="P75" style:family="paragraph" style:parent-style-name="Standard" style:list-style-name="L15">
      <style:text-properties fo:font-size="11pt" fo:font-weight="normal" officeooo:rsid="001d590e" officeooo:paragraph-rsid="001d590e" style:font-size-asian="9.60000038146973pt" style:font-weight-asian="normal" style:font-size-complex="11pt" style:font-weight-complex="normal"/>
    </style:style>
    <style:style style:name="T1" style:family="text">
      <style:text-properties fo:color="#b2b2b2" loext:opacity="100%" fo:font-size="20pt" fo:font-style="italic" fo:font-weight="bold" style:font-size-asian="20pt" style:font-style-asian="italic" style:font-weight-asian="bold" style:font-size-complex="20pt" style:font-style-complex="italic" style:font-weight-complex="bold"/>
    </style:style>
    <style:style style:name="T2" style:family="text">
      <style:text-properties fo:font-size="20pt" fo:font-style="italic" fo:font-weight="bold" style:font-size-asian="20pt" style:font-style-asian="italic" style:font-weight-asian="bold" style:font-size-complex="20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officeooo:rsid="000e9ecf"/>
    </style:style>
    <style:style style:name="T5" style:family="text">
      <style:text-properties fo:font-weight="bold" style:font-weight-asian="bold" style:font-weight-complex="bold"/>
    </style:style>
    <style:style style:name="T6" style:family="text">
      <style:text-properties fo:language="en" fo:country="US"/>
    </style:style>
    <style:style style:name="T7" style:family="text">
      <style:text-properties fo:color="#ff0000" loext:opacity="100%" fo:font-size="11pt" fo:font-style="normal" fo:font-weight="normal" officeooo:rsid="000e9ecf" style:font-size-asian="9.60000038146973pt" style:font-style-asian="normal" style:font-weight-asian="normal" style:font-size-complex="11pt" style:font-style-complex="normal" style:font-weight-complex="normal"/>
    </style:style>
    <style:style style:name="T8" style:family="text">
      <style:text-properties officeooo:rsid="0010588b"/>
    </style:style>
    <style:style style:name="T9" style:family="text">
      <style:text-properties fo:font-size="11pt" fo:font-style="normal" fo:font-weight="normal" officeooo:rsid="0010588b" style:font-size-asian="9.60000038146973pt" style:font-style-asian="normal" style:font-weight-asian="normal" style:font-size-complex="11pt" style:font-style-complex="normal" style:font-weight-complex="normal"/>
    </style:style>
    <style:style style:name="T1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fo:font-size="11pt" fo:font-style="normal" fo:font-weight="normal" officeooo:rsid="0010588b" style:font-size-asian="11pt" style:font-style-asian="normal" style:font-weight-asian="normal" style:font-size-complex="11pt" style:font-style-complex="normal" style:font-weight-complex="normal"/>
    </style:style>
    <style:style style:name="T12" style:family="text">
      <style:text-properties officeooo:rsid="0011f5fe"/>
    </style:style>
    <style:style style:name="T13" style:family="text">
      <style:text-properties officeooo:rsid="0011c23d"/>
    </style:style>
    <style:style style:name="T14" style:family="text">
      <style:text-properties fo:color="#b2b2b2" loext:opacity="100%" fo:font-size="13pt" fo:font-style="italic" style:font-size-asian="13pt" style:font-style-asian="italic" style:font-size-complex="13pt" style:font-style-complex="italic"/>
    </style:style>
    <style:style style:name="T15" style:family="text">
      <style:text-properties fo:font-size="13pt" fo:font-style="italic" style:font-size-asian="13pt" style:font-style-asian="italic" style:font-size-complex="13pt" style:font-style-complex="italic"/>
    </style:style>
    <style:style style:name="T16" style:family="text">
      <style:text-properties fo:font-style="italic" style:font-style-asian="italic" style:font-style-complex="italic"/>
    </style:style>
    <style:style style:name="T17" style:family="text">
      <style:text-properties officeooo:rsid="00191b35"/>
    </style:style>
    <style:style style:name="T18" style:family="text">
      <style:text-properties fo:color="#000000" loext:opacity="100%" fo:font-size="13pt" fo:font-style="italic" officeooo:rsid="00146432" style:font-size-asian="13pt" style:font-style-asian="italic" style:font-size-complex="13pt" style:font-style-complex="italic"/>
    </style:style>
    <style:style style:name="T19" style:family="text">
      <style:text-properties fo:color="#bcbec4" loext:opacity="100%" style:font-name="JetBrains Mono" fo:font-size="10pt" fo:font-style="normal" fo:font-weight="normal" style:font-size-asian="10pt" style:font-style-asian="normal" style:font-weight-asian="normal"/>
    </style:style>
    <style:style style:name="T20" style:family="text">
      <style:text-properties fo:color="#bcbec4" loext:opacity="100%" style:font-name="JetBrains Mono" fo:font-style="normal" fo:font-weight="normal" style:font-style-asian="normal" style:font-weight-asian="normal"/>
    </style:style>
    <style:style style:name="T21" style:family="text">
      <style:text-properties fo:color="#c77dbb" loext:opacity="100%" style:font-name="JetBrains Mono" fo:font-style="normal" fo:font-weight="normal" style:font-style-asian="normal" style:font-weight-asian="normal"/>
    </style:style>
    <style:style style:name="T22" style:family="text">
      <style:text-properties fo:color="#6aab73" loext:opacity="100%" style:font-name="JetBrains Mono" fo:font-style="normal" fo:font-weight="normal" style:font-style-asian="normal" style:font-weight-asian="normal"/>
    </style:style>
    <style:style style:name="T23" style:family="text">
      <style:text-properties fo:color="#6aab73" loext:opacity="100%" style:font-name="JetBrains Mono" fo:font-style="normal" fo:font-weight="normal" officeooo:rsid="00146432" style:font-style-asian="normal" style:font-weight-asian="normal"/>
    </style:style>
    <style:style style:name="T24" style:family="text">
      <style:text-properties fo:color="#6aab73" loext:opacity="100%" style:font-name="JetBrains Mono" fo:font-style="normal" fo:font-weight="normal" officeooo:rsid="00152d81" style:font-style-asian="normal" style:font-weight-asian="normal"/>
    </style:style>
    <style:style style:name="T25" style:family="text">
      <style:text-properties fo:color="#c77dbb" loext:opacity="100%"/>
    </style:style>
    <style:style style:name="T26" style:family="text">
      <style:text-properties fo:color="#6aab73" loext:opacity="100%"/>
    </style:style>
    <style:style style:name="T27" style:family="text">
      <style:text-properties fo:color="#6aab73" loext:opacity="100%" officeooo:rsid="00146432"/>
    </style:style>
    <style:style style:name="T28" style:family="text">
      <style:text-properties fo:color="#6aab73" loext:opacity="100%" officeooo:rsid="00152d81"/>
    </style:style>
    <style:style style:name="T29" style:family="text">
      <style:text-properties fo:color="#b2b2b2" loext:opacity="100%" fo:font-size="13pt" fo:font-style="italic" officeooo:rsid="00146432" style:font-size-asian="13pt" style:font-style-asian="italic" style:font-size-complex="13pt" style:font-style-complex="italic"/>
    </style:style>
    <style:style style:name="T30" style:family="text">
      <style:text-properties officeooo:rsid="0016130c"/>
    </style:style>
    <style:style style:name="T31" style:family="text">
      <style:text-properties style:use-window-font-color="true" loext:opacity="0%" fo:font-size="13pt" fo:font-style="italic" officeooo:rsid="00171a9e" style:font-size-asian="13pt" style:font-style-asian="italic" style:font-size-complex="13pt" style:font-style-complex="italic"/>
    </style:style>
    <style:style style:name="T32" style:family="text">
      <style:text-properties fo:font-size="11pt" fo:font-weight="normal" officeooo:rsid="00191b35" style:font-size-asian="9.60000038146973pt" style:font-weight-asian="normal" style:font-size-complex="11pt" style:font-weight-complex="normal"/>
    </style:style>
    <style:style style:name="T33" style:family="text">
      <style:text-properties fo:font-size="11pt" fo:font-weight="normal" officeooo:rsid="00171a9e" style:font-size-asian="9.60000038146973pt" style:font-weight-asian="normal" style:font-size-complex="11pt" style:font-weight-complex="normal"/>
    </style:style>
    <style:style style:name="T34" style:family="text">
      <style:text-properties fo:font-size="11pt" fo:font-weight="normal" officeooo:rsid="0017af55" style:font-size-asian="9.60000038146973pt" style:font-weight-asian="normal" style:font-size-complex="11pt" style:font-weight-complex="normal"/>
    </style:style>
    <style:style style:name="T35" style:family="text">
      <style:text-properties fo:color="#b2b2b2" loext:opacity="100%" fo:font-size="13pt" fo:font-style="italic" fo:font-weight="normal" officeooo:rsid="00191b35" style:font-size-asian="13pt" style:font-style-asian="italic" style:font-weight-asian="normal" style:font-size-complex="13pt" style:font-style-complex="italic" style:font-weight-complex="normal"/>
    </style:style>
    <style:style style:name="T36" style:family="text">
      <style:text-properties fo:color="#b2b2b2" loext:opacity="100%" fo:font-size="13pt" fo:font-style="italic" fo:font-weight="normal" officeooo:rsid="001a588a" style:font-size-asian="13pt" style:font-style-asian="italic" style:font-weight-asian="normal" style:font-size-complex="13pt" style:font-style-complex="italic" style:font-weight-complex="normal"/>
    </style:style>
    <style:style style:name="T37" style:family="text">
      <style:text-properties style:use-window-font-color="true" loext:opacity="0%" fo:font-size="13pt" fo:font-style="italic" fo:font-weight="normal" officeooo:rsid="001b966c" style:font-size-asian="13pt" style:font-style-asian="italic" style:font-weight-asian="normal" style:font-size-complex="13pt" style:font-style-complex="italic" style:font-weight-complex="normal"/>
    </style:style>
    <style:style style:name="T38" style:family="text">
      <style:text-properties style:use-window-font-color="true" loext:opacity="0%" fo:font-size="13pt" fo:font-style="italic" fo:font-weight="normal" officeooo:rsid="001a588a" style:font-size-asian="13pt" style:font-style-asian="italic" style:font-weight-asian="normal" style:font-size-complex="13pt" style:font-style-complex="italic" style:font-weight-complex="normal"/>
    </style:style>
    <style:style style:name="T39" style:family="text">
      <style:text-properties officeooo:rsid="001a78c6"/>
    </style:style>
    <style:style style:name="T40" style:family="text">
      <style:text-properties officeooo:rsid="001d590e"/>
    </style:style>
    <style:style style:name="T41" style:family="text">
      <style:text-properties fo:color="#b2b2b2" loext:opacity="100%" fo:font-size="13pt" fo:font-style="italic" officeooo:rsid="00191b35" style:font-size-asian="13pt" style:font-style-asian="italic" style:font-size-complex="13pt" style:font-style-complex="italic"/>
    </style:style>
    <style:style style:name="T42" style:family="text">
      <style:text-properties fo:color="#b2b2b2" loext:opacity="100%" fo:font-size="13pt" fo:font-style="italic" officeooo:rsid="001ca14e" style:font-size-asian="13pt" style:font-style-asian="italic" style:font-size-complex="13pt" style:font-style-complex="italic"/>
    </style:style>
    <style:style style:name="T43" style:family="text">
      <style:text-properties style:use-window-font-color="true" loext:opacity="0%" fo:font-size="13pt" fo:font-style="italic" officeooo:rsid="001ca14e" style:font-size-asian="13pt" style:font-style-asian="italic" style:font-size-complex="13pt" style:font-style-complex="italic"/>
    </style:style>
    <style:style style:name="T44" style:family="text">
      <style:text-properties style:use-window-font-color="true" loext:opacity="0%" fo:font-size="13pt" fo:font-style="italic" officeooo:rsid="001a588a" style:font-size-asian="13pt" style:font-style-asian="italic" style:font-size-complex="13pt" style:font-style-complex="italic"/>
    </style:style>
    <style:style style:name="T45" style:family="text">
      <style:text-properties style:use-window-font-color="true" loext:opacity="0%" fo:font-size="11pt" fo:font-style="normal" officeooo:rsid="001d590e" style:font-size-asian="9.60000038146973pt" style:font-style-asian="normal" style:font-size-complex="11pt" style:font-style-complex="normal"/>
    </style:style>
    <style:style style:name="T46" style:family="text">
      <style:text-properties fo:font-variant="normal" fo:text-transform="none" fo:color="#000000" loext:opacity="100%" fo:font-size="11pt" fo:font-style="normal" officeooo:rsid="00224c09" style:font-size-asian="9.60000038146973pt" style:font-style-asian="normal" style:font-size-complex="11pt" style:font-style-complex="normal"/>
    </style:style>
    <style:style style:name="T47" style:family="text">
      <style:text-properties style:use-window-font-color="true" loext:opacity="0%" fo:font-size="11pt" fo:font-style="normal" officeooo:rsid="001d8092" style:font-size-asian="9.60000038146973pt" style:font-style-asian="normal" style:font-size-complex="11pt" style:font-style-complex="normal"/>
    </style:style>
    <style:style style:name="T48" style:family="text">
      <style:text-properties officeooo:rsid="00224c09"/>
    </style:style>
    <style:style style:name="T49" style:family="text">
      <style:text-properties officeooo:rsid="0024a21c"/>
    </style:style>
    <style:style style:name="T50" style:family="text">
      <style:text-properties style:use-window-font-color="true" loext:opacity="0%" fo:font-size="11pt" fo:font-style="normal" officeooo:rsid="0024a21c" style:font-size-asian="9.60000038146973pt" style:font-style-asian="normal" style:font-size-complex="11pt" style:font-style-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905cm"/>
        </style:list-level-properties>
        <style:text-properties style:font-name="Apto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 Praktikum Peter 2026</text:p>
      <text:p text:style-name="P2"/>
      <text:p text:style-name="P3">1. Vorüberlegungen</text:p>
      <text:p text:style-name="P4"/>
      <text:p text:style-name="Standard"><text:span text:style-name="Absatz-Standardschriftart"><text:span text:style-name="T1">1.1</text:span></text:span><text:span text:style-name="Absatz-Standardschriftart"><text:span text:style-name="T2"> Benutzerinteresse</text:span></text:span></text:p>
      <text:list xml:id="list881525315" text:style-name="L1">
        <text:list-item>
          <text:p text:style-name="P5">Welche Fragen stellen Studieninteressierte und Erstsemestler am häufigsten</text:p>
        </text:list-item>
      </text:list>
      <text:list text:style-name="L2">
        <text:list-item>
          <text:p text:style-name="P6">“Welcher Studiengang passt zu mir”</text:p>
        </text:list-item>
        <text:list-item>
          <text:p text:style-name="P6">“Wie läuft ein Studium an der HTWK ab?”</text:p>
        </text:list-item>
        <text:list-item>
          <text:p text:style-name="P6">“Welchen Unterschied gibt es zwischen einer Uni und einer Hochschule?”</text:p>
        </text:list-item>
        <text:list-item>
          <text:p text:style-name="P6">“Was kann ich mit dem Studiengang (Print) später beruflich machen?”</text:p>
        </text:list-item>
        <text:list-item>
          <text:p text:style-name="P6">“Was bedeutet der Begriff .......”</text:p>
        </text:list-item>
        <text:list-item>
          <text:p text:style-name="P6">Fragen zum Unterrichtsinhalt (z.B. im Bereich Print und Verpackungen)</text:p>
        </text:list-item>
        <text:list-item>
          <text:p text:style-name="P6">Spezifische HTWK-Fragen (zum Gelände, Metainformationen etz)</text:p>
        </text:list-item>
      </text:list>
      <text:list text:continue-list="list881525315" text:style-name="L1">
        <text:list-item>
          <text:p text:style-name="P5">Welchen Mehrwert soll der Chatbot den Endnutzer bringen</text:p>
        </text:list-item>
      </text:list>
      <text:p text:style-name="P7">Der Chatbot soll als eine außerschulische Ansprechperson dienen, der für Fragen und Informationen sicher beantwortet und sich dabei auf sichere Fakten von offiziellen externen Dokumenten berufen. Das kann sowohl Studierenden als auch Profs unterstützen bzw. entlasten.</text:p>
      <text:list text:continue-numbering="true" text:style-name="L1">
        <text:list-item>
          <text:p text:style-name="P8"><text:span text:style-name="Absatz-Standardschriftart"><text:span text:style-name="T3">Wie viele Bereiche soll der Chatbot abdecken</text:span></text:span></text:p>
        </text:list-item>
      </text:list>
      <text:list text:style-name="L3">
        <text:list-item>
          <text:p text:style-name="P9">Print</text:p>
        </text:list-item>
        <text:list-item>
          <text:p text:style-name="P9">Verpackung</text:p>
        </text:list-item>
        <text:list-item>
          <text:p text:style-name="P9">Studieneinstieg</text:p>
        </text:list-item>
        <text:list-item>
          <text:p text:style-name="P9">Studienalltag</text:p>
        </text:list-item>
        <text:list-item>
          <text:p text:style-name="P9">HTWL-domainspezifische Informationen (z.B. Gebäude oder Professoreninfos)</text:p>
        </text:list-item>
        <text:list-item>
          <text:p text:style-name="P9">(KI-training<text:span text:style-name="T4">)</text:span></text:p>
        </text:list-item>
      </text:list>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p text:style-name="P10"/>
      <text:p text:style-name="P10"/>
      <text:p text:style-name="Standard"><text:soft-page-break/><text:span text:style-name="Absatz-Standardschriftart"><text:span text:style-name="T1">1.2</text:span></text:span><text:span text:style-name="Absatz-Standardschriftart"><text:span text:style-name="T2"> Bibliotheken und Runtime</text:span></text:span></text:p>
      <text:list text:style-name="L4">
        <text:list-item>
          <text:p text:style-name="P11">Welche Sprachen und Runtimes nutze ich?</text:p>
        </text:list-item>
      </text:list>
      <text:p text:style-name="P12"/>
      <table:table table:name="Tabelle1" table:style-name="Tabelle1">
        <table:table-column table:style-name="Tabelle1.A" table:number-columns-repeated="3"/>
        <table:table-row table:style-name="Tabelle1.1">
          <table:table-cell table:style-name="Tabelle1.A1" office:value-type="string">
            <text:p text:style-name="P13">Runtime</text:p>
          </table:table-cell>
          <table:table-cell table:style-name="Tabelle1.A1" office:value-type="string">
            <text:p text:style-name="P13">Language</text:p>
          </table:table-cell>
          <table:table-cell table:style-name="Tabelle1.A1" office:value-type="string">
            <text:p text:style-name="P13">Nutzen</text:p>
          </table:table-cell>
        </table:table-row>
        <table:table-row table:style-name="Tabelle1.1">
          <table:table-cell table:style-name="Tabelle1.A2" office:value-type="string">
            <text:p text:style-name="Standard">Python virtual Environment</text:p>
          </table:table-cell>
          <table:table-cell table:style-name="Tabelle1.A2" office:value-type="string">
            <text:p text:style-name="Standard">Python</text:p>
          </table:table-cell>
          <table:table-cell table:style-name="Tabelle1.A2" office:value-type="string">
            <text:p text:style-name="Standard">Backend für AI-Model</text:p>
          </table:table-cell>
        </table:table-row>
        <table:table-row table:style-name="Tabelle1.1">
          <table:table-cell table:style-name="Tabelle1.A2" office:value-type="string">
            <text:p text:style-name="Standard">NodeJS (Chromium)</text:p>
          </table:table-cell>
          <table:table-cell table:style-name="Tabelle1.A2" office:value-type="string">
            <text:p text:style-name="Standard">Javascript</text:p>
          </table:table-cell>
          <table:table-cell table:style-name="Tabelle1.A2" office:value-type="string">
            <text:p text:style-name="Standard">Server Backend für Client</text:p>
          </table:table-cell>
        </table:table-row>
        <table:table-row table:style-name="Tabelle1.1">
          <table:table-cell table:style-name="Tabelle1.A4" office:value-type="string">
            <text:p text:style-name="Standard">Javascript Frontend</text:p>
          </table:table-cell>
          <table:table-cell table:style-name="Tabelle1.A4" office:value-type="string">
            <text:p text:style-name="Standard">HTWML, Javascript, CSS</text:p>
          </table:table-cell>
          <table:table-cell table:style-name="Tabelle1.A4" office:value-type="string">
            <text:p text:style-name="Standard">Website und Interface für Benutzer</text:p>
          </table:table-cell>
        </table:table-row>
      </table:table>
      <text:p text:style-name="P14"/>
      <text:p text:style-name="P14"/>
      <text:p text:style-name="P15">Das Folgende soll den Prozess einer Nachricht auf dem Backend visualisieren:</text:p>
      <text:p text:style-name="P15"><draw:frame draw:style-name="fr1" draw:name="drawing" text:anchor-type="as-char" svg:y="0cm" svg:width="16.378cm" style:rel-width="scale" svg:height="13.996cm" style:rel-height="scale" draw:z-index="0"><draw:image xlink:href="Pictures/100000010000038E0000030A4AEDAAAA.png" xlink:type="simple" xlink:show="embed" xlink:actuate="onLoad" draw:mime-type="image/png"/></draw:frame></text:p>
      <text:p text:style-name="P12"/>
      <text:p text:style-name="P16"/>
      <text:p text:style-name="P16"/>
      <text:p text:style-name="P16"/>
      <text:p text:style-name="P16"/>
      <text:p text:style-name="P16"/>
      <text:p text:style-name="P16"/>
      <text:p text:style-name="P16"/>
      <text:p text:style-name="P16"/>
      <text:list text:style-name="L5">
        <text:list-item>
          <text:p text:style-name="P17"><text:soft-page-break/>Welche Bibliotheken nutze ich und brauche ich?</text:p>
        </text:list-item>
      </text:list>
      <text:p text:style-name="P18">NodeJS:</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3">Bibliothek</text:p>
          </table:table-cell>
          <table:table-cell table:style-name="Tabelle2.A1" office:value-type="string">
            <text:p text:style-name="P13">Version</text:p>
          </table:table-cell>
          <table:table-cell table:style-name="Tabelle2.A1" office:value-type="string">
            <text:p text:style-name="P13">Nutzen</text:p>
          </table:table-cell>
          <table:table-cell table:style-name="Tabelle2.A1" office:value-type="string">
            <text:p text:style-name="Standard"><text:span text:style-name="Absatz-Standardschriftart"><text:span text:style-name="T5">Quellenverweis</text:span></text:span></text:p>
          </table:table-cell>
        </table:table-row>
        <table:table-row table:style-name="Tabelle2.1">
          <table:table-cell table:style-name="Tabelle2.A2" office:value-type="string">
            <text:p text:style-name="Standard">npm:fastify</text:p>
          </table:table-cell>
          <table:table-cell table:style-name="Tabelle2.A2" office:value-type="string">
            <text:p text:style-name="Standard">9.1.3</text:p>
          </table:table-cell>
          <table:table-cell table:style-name="Tabelle2.A2" office:value-type="string">
            <text:p text:style-name="Standard">Dient als Runtimeengine für den Server, verwaltet PORTS und leitet Anfragen weiter. Es dient als eine moderne Alternative zu veralteten Nodebibliotheken.</text:p>
          </table:table-cell>
          <table:table-cell table:style-name="Tabelle2.A2" office:value-type="string">
            <text:p text:style-name="Standard"><text:a xlink:type="simple" xlink:href="https://www.npmjs.com/package/fastify" office:target-frame-name="_top" xlink:show="replace" text:style-name="Internet_20_link" text:visited-style-name="Visited_20_Internet_20_Link"><text:span text:style-name="Hyperlink">https://www.npmjs.com/package/fastify</text:span></text:a></text:p>
            <text:p text:style-name="Standard"/>
            <text:p text:style-name="Standard"/>
          </table:table-cell>
        </table:table-row>
        <table:table-row table:style-name="Tabelle2.1">
          <table:table-cell table:style-name="Tabelle2.A3" office:value-type="string">
            <text:p text:style-name="Standard">npm:@fastify/static</text:p>
          </table:table-cell>
          <table:table-cell table:style-name="Tabelle2.A3" office:value-type="string">
            <text:p text:style-name="Standard">5.8.5</text:p>
          </table:table-cell>
          <table:table-cell table:style-name="Tabelle2.A3" office:value-type="string">
            <text:p text:style-name="Standard">Dient als Sublibrary für die Website. Sorgt dafür, dass man eine Weiterleitung unter einer URI direkt unter einen Ordner (./public) festlegen kann.</text:p>
          </table:table-cell>
          <table:table-cell table:style-name="Tabelle2.A3" office:value-type="string">
            <text:p text:style-name="Standard"><text:a xlink:type="simple" xlink:href="https://www.npmjs.com/package/@fastify/static" office:target-frame-name="_top" xlink:show="replace" text:style-name="Internet_20_link" text:visited-style-name="Visited_20_Internet_20_Link"><text:span text:style-name="Hyperlink">https://www.npmjs.com/package/@fastify/static</text:span></text:a></text:p>
            <text:p text:style-name="Standard"/>
            <text:p text:style-name="Standard"/>
          </table:table-cell>
        </table:table-row>
      </table:table>
      <text:p text:style-name="P19"/>
      <text:p text:style-name="P19">Python (die wichtigsten): <text:s/></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3">Bibliothek</text:p>
          </table:table-cell>
          <table:table-cell table:style-name="Tabelle3.A1" office:value-type="string">
            <text:p text:style-name="P13">Version</text:p>
          </table:table-cell>
          <table:table-cell table:style-name="Tabelle3.A1" office:value-type="string">
            <text:p text:style-name="P13">Nutzen</text:p>
          </table:table-cell>
          <table:table-cell table:style-name="Tabelle3.A1" office:value-type="string">
            <text:p text:style-name="Standard"><text:span text:style-name="Absatz-Standardschriftart"><text:span text:style-name="T5">Quellenverweis</text:span></text:span></text:p>
          </table:table-cell>
        </table:table-row>
        <table:table-row table:style-name="Tabelle3.1">
          <table:table-cell table:style-name="Tabelle3.A2" office:value-type="string">
            <text:p text:style-name="Standard">pip:flask</text:p>
          </table:table-cell>
          <table:table-cell table:style-name="Tabelle3.A2" office:value-type="string">
            <text:p text:style-name="Standard">3.1.3</text:p>
          </table:table-cell>
          <table:table-cell table:style-name="Tabelle3.A2" office:value-type="string">
            <text:p text:style-name="Standard">Dient als Serverruntime um Anfragen entgegenzunehmen.</text:p>
          </table:table-cell>
          <table:table-cell table:style-name="Tabelle3.A2" office:value-type="string">
            <text:p text:style-name="Standard"><text:a xlink:type="simple" xlink:href="https://pypi.org/project/Flask/" office:target-frame-name="_top" xlink:show="replace" text:style-name="Internet_20_link" text:visited-style-name="Visited_20_Internet_20_Link"><text:span text:style-name="Hyperlink">https://www.npmjs.com/package/fastify</text:span></text:a></text:p>
          </table:table-cell>
        </table:table-row>
        <table:table-row table:style-name="Tabelle3.3">
          <table:table-cell table:style-name="Tabelle3.A2" office:value-type="string">
            <text:p text:style-name="Standard">pip:waitress</text:p>
          </table:table-cell>
          <table:table-cell table:style-name="Tabelle3.A2" office:value-type="string">
            <text:p text:style-name="Standard">3.0.2</text:p>
          </table:table-cell>
          <table:table-cell table:style-name="Tabelle3.A2" office:value-type="string">
            <text:p text:style-name="Standard">Dient als Unterstützung für Flask. Lässt Flask Serveranfragen paralel bearbeiten (threading) um die Geschwindigkeit in hohem Tempo zu bearbeiten.</text:p>
          </table:table-cell>
          <table:table-cell table:style-name="Tabelle3.A2" office:value-type="string">
            <text:p text:style-name="Standard"><text:a xlink:type="simple" xlink:href="https://pypi.org/project/waitress/" office:target-frame-name="_top" xlink:show="replace" text:style-name="Internet_20_link" text:visited-style-name="Visited_20_Internet_20_Link"><text:span text:style-name="Hyperlink">https://www.npmjs.com/package/@fastify/static</text:span></text:a></text:p>
          </table:table-cell>
        </table:table-row>
        <table:table-row table:style-name="Tabelle3.3">
          <table:table-cell table:style-name="Tabelle3.A2" office:value-type="string">
            <text:p text:style-name="Standard">pip:torch</text:p>
          </table:table-cell>
          <table:table-cell table:style-name="Tabelle3.A2" office:value-type="string">
            <text:p text:style-name="Standard">2.8.0</text:p>
          </table:table-cell>
          <table:table-cell table:style-name="Tabelle3.A2" office:value-type="string">
            <text:p text:style-name="Standard">Dient als Runtime für das KI-Modell und als Herzstück des gesamten Projektes. Lädt das KI-Modell, finetuned es und führt es aus. Pytorch ist weltweit mit die wichtigste Opensource-Bibliothek für KI und machienelles Lernen.</text:p>
          </table:table-cell>
          <table:table-cell table:style-name="Tabelle3.A2" office:value-type="string">
            <text:p text:style-name="Standard"><text:a xlink:type="simple" xlink:href="https://pypi.org/project/torch/" office:target-frame-name="_top" xlink:show="replace" text:style-name="Internet_20_link" text:visited-style-name="Visited_20_Internet_20_Link"><text:span text:style-name="Hyperlink">https://pypi.org/project/torch/</text:span></text:a></text:p>
            <text:p text:style-name="Standard"><text:span text:style-name="Absatz-Standardschriftart"><text:span text:style-name="T6">Und (official):</text:span></text:span><text:line-break/><text:a xlink:type="simple" xlink:href="https://pytorch.org/" office:target-frame-name="_top" xlink:show="replace" text:style-name="Internet_20_link" text:visited-style-name="Visited_20_Internet_20_Link"><text:span text:style-name="Hyperlink"><text:span text:style-name="T6">https://pytorch.org</text:span></text:span></text:a></text:p>
          </table:table-cell>
        </table:table-row>
        <table:table-row table:style-name="Tabelle3.3">
          <table:table-cell table:style-name="Tabelle3.A2" office:value-type="string">
            <text:p text:style-name="Standard">pip:transformers</text:p>
          </table:table-cell>
          <table:table-cell table:style-name="Tabelle3.A2" office:value-type="string">
            <text:p text:style-name="Standard">4.57.1</text:p>
          </table:table-cell>
          <table:table-cell table:style-name="Tabelle3.A2" office:value-type="string">
            <text:p text:style-name="Standard">Transformers ist das klassische Format für KI-Modelle und unterstützt und ermöglicht erst, dass Modell so einfach zu laden.</text:p>
          </table:table-cell>
          <table:table-cell table:style-name="Tabelle3.A2" office:value-type="string">
            <text:p text:style-name="Standard"><text:a xlink:type="simple" xlink:href="https://pypi.org/project/transformers/" office:target-frame-name="_top" xlink:show="replace" text:style-name="Internet_20_link" text:visited-style-name="Visited_20_Internet_20_Link"><text:span text:style-name="Hyperlink">https://pypi.org/project/transformers/</text:span></text:a></text:p>
            <text:p text:style-name="Standard">Und (für Installation):</text:p>
            <text:p text:style-name="Standard"><text:a xlink:type="simple" xlink:href="https://huggingface.co/docs/transformers/de/installation" office:target-frame-name="_top" xlink:show="replace" text:style-name="Internet_20_link" text:visited-style-name="Visited_20_Internet_20_Link"><text:span text:style-name="Hyperlink">https://huggingface.co/docs/transformers/de/installation</text:span></text:a></text:p>
            <text:p text:style-name="Standard"/>
            <text:p text:style-name="Standard"/>
          </table:table-cell>
        </table:table-row>
        <table:table-row table:style-name="Tabelle3.3">
          <table:table-cell table:style-name="Tabelle3.A6" office:value-type="string">
            <text:p text:style-name="Standard">pip:datasets</text:p>
          </table:table-cell>
          <table:table-cell table:style-name="Tabelle3.A6" office:value-type="string">
            <text:p text:style-name="Standard">4.3.0</text:p>
          </table:table-cell>
          <table:table-cell table:style-name="Tabelle3.A6" office:value-type="string">
            <text:p text:style-name="Standard">Datasets ist der Standardweg zum Laden, Verarbeiten und Nutzen großer Datenmengen wie z.B. Trainingsdaten für das kommerzielle KI-training.</text:p>
          </table:table-cell>
          <table:table-cell table:style-name="Tabelle3.A6" office:value-type="string">
            <text:p text:style-name="Standard"><text:a xlink:type="simple" xlink:href="https://pypi.org/project/datasets/" office:target-frame-name="_top" xlink:show="replace" text:style-name="Internet_20_link" text:visited-style-name="Visited_20_Internet_20_Link"><text:span text:style-name="Hyperlink">https://pypi.org/project/datasets/</text:span></text:a></text:p>
            <text:p text:style-name="Standard">Und:</text:p>
            <text:p text:style-name="Standard"><text:a xlink:type="simple" xlink:href="https://huggingface.co/docs/datasets/installation" office:target-frame-name="_top" xlink:show="replace" text:style-name="Internet_20_link" text:visited-style-name="Visited_20_Internet_20_Link"><text:span text:style-name="Hyperlink">https://huggingface.co/docs/datasets/installation</text:span></text:a></text:p>
          </table:table-cell>
        </table:table-row>
      </table:table>
      <text:p text:style-name="Standard"/>
      <text:p text:style-name="Standard"/>
      <text:p text:style-name="P20"/>
      <text:p text:style-name="Standard"><text:soft-page-break/><text:span text:style-name="Absatz-Standardschriftart"><text:span text:style-name="T1"/></text:span></text:p>
      <text:p text:style-name="Standard"><text:span text:style-name="Absatz-Standardschriftart"><text:span text:style-name="T1">1.3</text:span></text:span><text:span text:style-name="Absatz-Standardschriftart"><text:span text:style-name="T2"> IT-Sicherheit</text:span></text:span></text:p>
      <text:list text:style-name="L6">
        <text:list-item>
          <text:p text:style-name="P21">Wie sichere ich den Server vor Angreifern?</text:p>
          <text:p text:style-name="P21">- <text:span text:style-name="T7">Keinen externen Code auf den Server ausführen oder gar hochladen lassen!</text:span></text:p>
          <text:p text:style-name="P22">- <text:span text:style-name="T4">Sicherheitsupdates haben Vorang vor Betrieb</text:span></text:p>
          <text:p text:style-name="P22">- <text:span text:style-name="T4">Keinen externen Zugriff auf Bootrechte</text:span></text:p>
          <text:p text:style-name="P22">- <text:span text:style-name="T4">KI keine Möglichkeit geben, Befehle oä. auszuführen</text:span></text:p>
        </text:list-item>
        <text:list-item>
          <text:p text:style-name="P21">Wie schütze ich den Chatbot und Nutzer vor Prompt-Injection?</text:p>
          <text:p text:style-name="P23">- <text:span text:style-name="T4">Keine Systemprompts auf Clientside → Systemprompt nur auf Backend HARDCODEN</text:span></text:p>
          <text:p text:style-name="P24">- <text:span text:style-name="T4">KI keine Möglichkeit geben, Befehle oä. Auszuführen</text:span></text:p>
          <text:p text:style-name="P24">- <text:span text:style-name="T4">Evtl. rechtliche Sichertheitswarnung für Nutzer</text:span></text:p>
        </text:list-item>
        <text:list-item>
          <text:p text:style-name="P21">Wie viele Freiheiten gebe ich den Nutzer?</text:p>
          <text:p text:style-name="P23">- <text:span text:style-name="T4">Reine Textnachrichten senden</text:span></text:p>
        </text:list-item>
        <text:list-item>
          <text:p text:style-name="P25">Gibt es eine langzeitarchivierte Chathistory und wenn ja wo <text:span text:style-name="T4">ist</text:span> sie <text:span text:style-name="T4">ge</text:span>speicher<text:span text:style-name="T4">t</text:span>?</text:p>
          <text:p text:style-name="P26">Der Chatverlauf wird im Runtimestorage des Browsers unter einer einfachen Variable im Klartext gespeichert <text:span text:style-name="T8">werden. Das heißt bei einem neuladen der Seite wird der Chat weg sein. Der Chatbot soll keine Multichatfunktion oder eine langzeitarchivierte Chathistory aus reinen Sicherheits und speicher- bzw account- und datenrechtlichspezifischem Bedenken bieten.</text:span></text:p>
        </text:list-item>
      </text:list>
      <text:p text:style-name="Standard"/>
      <text:p text:style-name="Standard"><text:span text:style-name="Absatz-Standardschriftart"><text:span text:style-name="T1">1.4</text:span></text:span><text:span text:style-name="Absatz-Standardschriftart"><text:span text:style-name="T2"> Hosting bzw. Serverbetrieb</text:span></text:span></text:p>
      <text:list text:style-name="L7">
        <text:list-item>
          <text:p text:style-name="P27"><text:span text:style-name="Absatz-Standardschriftart"><text:span text:style-name="T3">Wo soll der Chatbot verfügbar sein (Internet oder HTWK-eigenes Intranet)?</text:span></text:span></text:p>
          <text:p text:style-name="P28"><text:span text:style-name="Absatz-Standardschriftart"><text:span text:style-name="T9">Die Frage ist für die Panung ersteinmal nicht relevant, da es egal wovon man zugreifen kann eine hohe Sicherheit bieten soll. Bei beiden Varianten benötigt man ein Server und die Weiterleitung von der Domain der HTWK zum Server oder vom Gateway des Intranets zum Server lässt sich je nach beliebn einrichten.</text:span></text:span></text:p>
        </text:list-item>
        <text:list-item>
          <text:p text:style-name="P27"><text:span text:style-name="Absatz-Standardschriftart"><text:span text:style-name="T3">Auf welchen Server läuft der Chatbot?</text:span></text:span></text:p>
          <text:p text:style-name="P28"><text:span text:style-name="Absatz-Standardschriftart"><text:span text:style-name="T9">Voraussichtlich auf einen lokalen Server in der HTWK-Leipzig</text:span></text:span></text:p>
        </text:list-item>
        <text:list-item>
          <text:p text:style-name="P27"><text:span text:style-name="Absatz-Standardschriftart"><text:span text:style-name="T3">Wie viele Ressourcen stehen dem Betrieb zur Verfügung</text:span></text:span></text:p>
          <text:p text:style-name="P27"><text:span text:style-name="Absatz-Standardschriftart"><text:span text:style-name="T10">--</text:span></text:span><text:span text:style-name="Absatz-Standardschriftart"><text:span text:style-name="T11">Unklar--</text:span></text:span></text:p>
        </text:list-item>
      </text:list>
      <text:p text:style-name="Standard"/>
      <text:p text:style-name="Standard"><text:span text:style-name="Absatz-Standardschriftart"><text:span text:style-name="T1">1.5</text:span></text:span><text:span text:style-name="Absatz-Standardschriftart"><text:span text:style-name="T2"> Rechtliches und Lizenzen</text:span></text:span></text:p>
      <text:list text:style-name="L8">
        <text:list-item>
          <text:p text:style-name="P29">Unter welchen Rechten läuft die Nutzung des gewählten Modells (welche Lizenzen)?</text:p>
          <text:p text:style-name="P30"><text:span text:style-name="T8">Apache 2.0 – kommerziell nutzbar und frei modifizierbar nur unter Angabe der Domain im Sourcecode und in der Veröffentlichung des daraus trainierten Modells (lesen sie hier: </text:span><text:a xlink:type="simple" xlink:href="https://www.apache.org/licenses/LICENSE-2.0.txt" text:style-name="Internet_20_link" text:visited-style-name="Visited_20_Internet_20_Link"><text:span text:style-name="T8">https://www.apache.org/licenses/LICENSE-2.0.txt</text:span></text:a><text:span text:style-name="T8">)</text:span></text:p>
        </text:list-item>
        <text:list-item>
          <text:p text:style-name="P30">Unter welchen Rechten läuft die Nutzung von Trainingsdaten (welche Lizenzen)?</text:p>
          <text:p text:style-name="P30">--<text:span text:style-name="T12">In Bearbeitung</text:span><text:span text:style-name="T8">--</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Absatz-Standardschriftart"><text:span text:style-name="T1">1.6</text:span></text:span><text:span text:style-name="Absatz-Standardschriftart"><text:span text:style-name="T2"> Basismodellauswahl</text:span></text:span></text:p>
      <text:list text:style-name="L9">
        <text:list-item>
          <text:p text:style-name="P31">Welches Modell eignet sich gut für alle Anforderungen als Basismodell?</text:p>
        </text:list-item>
      </text:list>
      <text:p text:style-name="P32"><text:span text:style-name="T8"><text:tab/>Folgendes Modell eignet sich gut: Huggingface:Qwen/Qwen3-4B-Instruct-2507</text:span></text:p>
      <text:p text:style-name="P32"><text:tab/><text:span text:style-name="T8">Hier finden Sie das Modell: </text:span><text:a xlink:type="simple" xlink:href="https://huggingface.co/Qwen/Qwen3-4B-Instruct-2507" text:style-name="Internet_20_link" text:visited-style-name="Visited_20_Internet_20_Link"><text:span text:style-name="T8">https://huggingface.co/Qwen/Qwen3-4B-Instruct-2507</text:span></text:a></text:p>
      <text:list text:continue-numbering="true" text:style-name="L9">
        <text:list-item>
          <text:p text:style-name="P31">Wie leistungsstark ist das betrachtete Modell?</text:p>
          <text:p text:style-name="P33">Das Modell hat 4.8 billion Parameter, 36 Transformerlayers, 32 Q- und 8 KV-Attention-Heads und schneidet an der spize sehr gut ab.</text:p>
        </text:list-item>
        <text:list-item>
          <text:p text:style-name="P31">Wie gut liegt das betrachtete Modell im Ranking gegenüber anderen?</text:p>
          <text:p text:style-name="P34">- <text:span text:style-name="T13">Beim Benchmarking</text:span> <text:a xlink:type="simple" xlink:href="https://www.distillabs.ai/blog/we-benchmarked-12-small-language-models-across-8-tasks-to-find-the-best-base-model-for-fine-tuning/" text:style-name="Internet_20_link" text:visited-style-name="Visited_20_Internet_20_Link"><text:span text:style-name="T13">DistilLabs</text:span></text:a><text:span text:style-name="T13"> belegte es unter 12 weiteren KI-Modellen den 1. Platz.</text:span></text:p>
          <text:p text:style-name="P34">- <text:span text:style-name="T13">Folgendend gut ist das Modell von 100% (perfekt):</text:span></text:p>
        </text:list-item>
      </text:list>
      <text:p text:style-name="P35"/>
      <table:table table:name="Tabelle4" table:style-name="Tabelle4">
        <table:table-column table:style-name="Tabelle4.A" table:number-columns-repeated="3"/>
        <table:table-row>
          <table:table-cell table:style-name="Tabelle4.A1" office:value-type="string">
            <text:p text:style-name="P36">Disziplin</text:p>
          </table:table-cell>
          <table:table-cell table:style-name="Tabelle4.A1" office:value-type="string">
            <text:p text:style-name="P36">Score in %</text:p>
          </table:table-cell>
          <table:table-cell table:style-name="Tabelle4.C1" office:value-type="string">
            <text:p text:style-name="P36">Einordnung</text:p>
          </table:table-cell>
        </table:table-row>
        <table:table-row>
          <table:table-cell table:style-name="Tabelle4.A2" office:value-type="string">
            <text:p text:style-name="P37">Mathematik (AIME25)</text:p>
          </table:table-cell>
          <table:table-cell table:style-name="Tabelle4.A2" office:value-type="string">
            <text:p text:style-name="P37">83.3</text:p>
          </table:table-cell>
          <table:table-cell table:style-name="Tabelle4.C2" office:value-type="string">
            <text:p text:style-name="P37">Absolutes Top-Nevau für SLMs</text:p>
          </table:table-cell>
        </table:table-row>
        <table:table-row>
          <table:table-cell table:style-name="Tabelle4.A2" office:value-type="string">
            <text:p text:style-name="P37">Wissenschaften (GPQA)</text:p>
          </table:table-cell>
          <table:table-cell table:style-name="Tabelle4.A2" office:value-type="string">
            <text:p text:style-name="P37">65.8</text:p>
          </table:table-cell>
          <table:table-cell table:style-name="Tabelle4.C2" office:value-type="string">
            <text:p text:style-name="P37">Weit über Klassendurchschnitt</text:p>
          </table:table-cell>
        </table:table-row>
        <table:table-row table:style-name="Tabelle4.4">
          <table:table-cell table:style-name="Tabelle4.A2" office:value-type="string">
            <text:p text:style-name="P37">Coding (Livecodebench)</text:p>
          </table:table-cell>
          <table:table-cell table:style-name="Tabelle4.A2" office:value-type="string">
            <text:p text:style-name="P37">55.2</text:p>
          </table:table-cell>
          <table:table-cell table:style-name="Tabelle4.C2" office:value-type="string">
            <text:p text:style-name="P37">Führen im Opensource Bereich</text:p>
          </table:table-cell>
        </table:table-row>
      </table:table>
      <text:list text:continue-numbering="true" text:style-name="L9">
        <text:list-header>
          <text:p text:style-name="P34"/>
          <text:p text:style-name="P34"/>
        </text:list-header>
        <text:list-item>
          <text:p text:style-name="P31">Wie viele Parameter hat es und welche Hardwareanforderungen sind benötigt?</text:p>
        </text:list-item>
      </text:list>
      <text:p text:style-name="P38">8-12 GB VRAM sind die Mindestvorderung. Das sollte mit einer NVDIA GeForce RTX 5090 mit 32 GB VRAM kein Problem sein und gut für den Serverbetrieb laufen.</text:p>
      <text:p text:style-name="P38"/>
      <text:p text:style-name="Standard"><text:span text:style-name="Absatz-Standardschriftart"><text:span text:style-name="T1">1.7</text:span></text:span><text:span text:style-name="Absatz-Standardschriftart"><text:span text:style-name="T2"> Aufwand und Risiken</text:span></text:span></text:p>
      <text:list text:style-name="L10">
        <text:list-item>
          <text:p text:style-name="P39">Wie viel Aufwand bringt die Planung?</text:p>
          <text:p text:style-name="P40">Nicht alzuviel ich denke relativ schnell.</text:p>
        </text:list-item>
        <text:list-item>
          <text:p text:style-name="P39">Wie viel Aufwand bringt das Finetuning?</text:p>
          <text:p text:style-name="P40">Max. zwei Wochen. Natürlich ist stark davon abhägig wie viel man täglich an den Chatbot arbeitet.</text:p>
        </text:list-item>
        <text:list-item>
          <text:p text:style-name="P39">Wie viel Aufwand bringt das Hosting und die Infrastruktur?</text:p>
          <text:p text:style-name="P40">Kommt auf die Gegebenheiten an aber ich denke ein bis drei Wochen.</text:p>
        </text:list-item>
        <text:list-item>
          <text:p text:style-name="P39">Wie viel Aufwand bringt die Instandhaltun<text:span text:style-name="T12">g</text:span></text:p>
          <text:p text:style-name="P40">Einiges also wöchentlich sollte jemand mal drüberschauen um Softwarefehler zu finden un Updates zu installieren.</text:p>
        </text:list-item>
        <text:list-item>
          <text:p text:style-name="P39">Welche potentiellen Risiken gehen mit dem Plan einher?</text:p>
          <text:p text:style-name="P40">Nicht viele bis keine.</text:p>
        </text:list-item>
      </text:list>
      <text:p text:style-name="P3"/>
      <text:p text:style-name="P3"/>
      <text:p text:style-name="P3"/>
      <text:p text:style-name="P3"/>
      <text:p text:style-name="P3"/>
      <text:p text:style-name="P3"/>
      <text:p text:style-name="P3"/>
      <text:p text:style-name="P3"/>
      <text:p text:style-name="P3"><text:soft-page-break/>2. Datagrapping</text:p>
      <text:p text:style-name="P13"/>
      <text:p text:style-name="Standard"><text:span text:style-name="Absatz-Standardschriftart"><text:span text:style-name="T14">2.1</text:span></text:span><text:span text:style-name="Absatz-Standardschriftart"><text:span text:style-name="T15"> Ziel</text:span></text:span><text:span text:style-name="Absatz-Standardschriftart"><text:span text:style-name="T16">:</text:span></text:span></text:p>
      <text:p text:style-name="P2">Das Erlernen von genauen Informationen zur der HTWK Leipzig.</text:p>
      <text:p text:style-name="P2"/>
      <text:p text:style-name="P2"/>
      <text:p text:style-name="P41">A Reines Finetuning:</text:p>
      <text:p text:style-name="P13"/>
      <text:p text:style-name="Standard"><text:span text:style-name="Absatz-Standardschriftart"><text:span text:style-name="T14">2A.1 </text:span></text:span><text:span text:style-name="Absatz-Standardschriftart"><text:span text:style-name="T15">Übersicht</text:span></text:span>:</text:p>
      <text:p text:style-name="Standard">Ansammeln von DS-Daten (Domain Specific bzw. HTWK Daten) und das Umwandeln derer in Chat-Templates durch ein lokales Modell.</text:p>
      <text:p text:style-name="Standard"/>
      <text:p text:style-name="Standard"><text:span text:style-name="Absatz-Standardschriftart"><text:span text:style-name="T14">2A.2 </text:span></text:span><text:span text:style-name="Absatz-Standardschriftart"><text:span text:style-name="T15">Ablauf</text:span></text:span>:</text:p>
      <text:list text:style-name="L11">
        <text:list-item>
          <text:p text:style-name="P42">Sammeln von HTWK-spezifischen Daten (Vorlesungen etc.)</text:p>
        </text:list-item>
        <text:list-item>
          <text:p text:style-name="P42">Semantische Aufteilung dieser Daten</text:p>
        </text:list-item>
        <text:list-item>
          <text:p text:style-name="P42">Generierung von Trainingsdaten im Chat-Template Format durch ein lokales Modell</text:p>
        </text:list-item>
        <text:list-item>
          <text:p text:style-name="P42">Überfliegen der Trainingsdaten durch eine Person bzw. ein lokales Modell (→ evtl. Verbesserung)</text:p>
        </text:list-item>
        <text:list-item>
          <text:p text:style-name="P42">Splitten der Trainingsdaten in Trainings- und Validierungsdaten</text:p>
        </text:list-item>
        <text:list-item>
          <text:p text:style-name="P42">Finetining</text:p>
        </text:list-item>
      </text:list>
      <text:p text:style-name="Standard"/>
      <text:p text:style-name="Standard"><text:span text:style-name="Absatz-Standardschriftart"><text:span text:style-name="T14">2A.3 </text:span></text:span><text:span text:style-name="Absatz-Standardschriftart"><text:span text:style-name="T15">Produkt</text:span></text:span>:</text:p>
      <text:p text:style-name="Standard">Modell <text:span text:style-name="Absatz-Standardschriftart"><text:span text:style-name="T5">Version 0.1.0</text:span></text:span> mir spezifischen Daten in den Gewichten des Modells</text:p>
      <text:p text:style-name="Standard"/>
      <text:p text:style-name="Standard"/>
      <text:p text:style-name="Standard"/>
      <text:p text:style-name="Standard"/>
      <text:p text:style-name="P41">B Vektordatenbank:</text:p>
      <text:p text:style-name="P13"/>
      <text:p text:style-name="Standard"><text:span text:style-name="Absatz-Standardschriftart"><text:span text:style-name="T14">2B.1 </text:span></text:span><text:span text:style-name="Absatz-Standardschriftart"><text:span text:style-name="T15">Übersicht</text:span></text:span>:</text:p>
      <text:p text:style-name="Standard">Ansammeln von DS-Daten (Domain Specific bzw. HTWK Daten) und das erstellen einer Vektordatenbank mithilfe eines lokalen Modells.</text:p>
      <text:p text:style-name="Standard"/>
      <text:p text:style-name="Standard"><text:span text:style-name="Absatz-Standardschriftart"><text:span text:style-name="T14">2B.2</text:span></text:span><text:span text:style-name="Absatz-Standardschriftart"><text:span text:style-name="T15"> Ablauf</text:span></text:span>:</text:p>
      <text:list text:style-name="L12">
        <text:list-item>
          <text:p text:style-name="P43">Sammeln von HTWK-spezifischen Daten (Vorlesungen etc.)</text:p>
        </text:list-item>
        <text:list-item>
          <text:p text:style-name="P43">Semantische Aufteilung dieser Daten</text:p>
        </text:list-item>
        <text:list-item>
          <text:p text:style-name="P43">Generierung einer Vektordatenbank durch ein lokales Modell (z.B. bge-m3)</text:p>
        </text:list-item>
        <text:list-item>
          <text:p text:style-name="P43">Splitten der Trainingsdaten in Trainings- und Validierungsdaten</text:p>
        </text:list-item>
      </text:list>
      <text:p text:style-name="Standard"/>
      <text:p text:style-name="Standard"><text:span text:style-name="Absatz-Standardschriftart"><text:span text:style-name="T14">2B.3</text:span></text:span><text:span text:style-name="Absatz-Standardschriftart"><text:span text:style-name="T15"> Produkt</text:span></text:span>:</text:p>
      <text:p text:style-name="Standard">Vektordatenbank mit spezifischen Daten</text:p>
      <text:p text:style-name="P3"/>
      <text:p text:style-name="P3"/>
      <text:p text:style-name="P3"/>
      <text:p text:style-name="P3"/>
      <text:p text:style-name="P3"><text:soft-page-break/>3. Schreiben von Chat-Templates</text:p>
      <text:p text:style-name="P13"/>
      <text:p text:style-name="Standard"><text:span text:style-name="Absatz-Standardschriftart"><text:span text:style-name="T14">3.1 </text:span></text:span><text:span text:style-name="Absatz-Standardschriftart"><text:span text:style-name="T15">Ziel</text:span></text:span><text:span text:style-name="Absatz-Standardschriftart"><text:span text:style-name="T5">:</text:span></text:span></text:p>
      <text:p text:style-name="Standard">Das Erlernen der richtigen Form der Antwort und dem richtigen Umgang bzw. Ausdruck mit dem Nutzer.</text:p>
      <text:p text:style-name="P13"/>
      <text:p text:style-name="Standard"><text:span text:style-name="Absatz-Standardschriftart"><text:span text:style-name="T14">3.2 </text:span></text:span><text:span text:style-name="Absatz-Standardschriftart"><text:span text:style-name="T15">Übersicht</text:span></text:span>:</text:p>
      <text:p text:style-name="Standard">Das manuelle Schreiben von Trainingsdaten im Chat-Template-Format.</text:p>
      <text:p text:style-name="Standard"/>
      <text:p text:style-name="Standard"><text:span text:style-name="Absatz-Standardschriftart"><text:span text:style-name="T14">3.3 </text:span></text:span><text:span text:style-name="Absatz-Standardschriftart"><text:span text:style-name="T15">Ablauf</text:span></text:span>:</text:p>
      <text:list text:style-name="L13">
        <text:list-item>
          <text:p text:style-name="P44">Definier<text:span text:style-name="T17">en</text:span> der Eigenschaften des Chatbots</text:p>
        </text:list-item>
        <text:list-item>
          <text:p text:style-name="P44">Auf <text:span text:style-name="Absatz-Standardschriftart"><text:span text:style-name="T16">Schritt 1.</text:span></text:span> Basierende Planung der Reihenfolge (nach dem Prinzip wichtigstes zuerst und zuletzt)</text:p>
        </text:list-item>
        <text:list-item>
          <text:p text:style-name="P44">Schreiben der Trainingsdaten</text:p>
        </text:list-item>
        <text:list-item>
          <text:p text:style-name="P44">Splitten der Trainingsdaten in Trainings- und Validierungsdaten</text:p>
        </text:list-item>
        <text:list-item>
          <text:p text:style-name="P44">Finetuning des KI-Modells (<text:span text:style-name="Absatz-Standardschriftart"><text:span text:style-name="T5">Version </text:span></text:span><text:span text:style-name="Absatz-Standardschriftart"><text:span text:style-name="T16">[2.1]</text:span></text:span><text:span text:style-name="Absatz-Standardschriftart"><text:span text:style-name="T5"> 0.1.0 </text:span></text:span><text:span text:style-name="Absatz-Standardschriftart"><text:span text:style-name="T16">[2.2]</text:span></text:span><text:span text:style-name="Absatz-Standardschriftart"><text:span text:style-name="T5"> 0.0.0</text:span></text:span>) in eventueller Beachtung der Vektordatenbank abhängig von 2.x</text:p>
        </text:list-item>
      </text:list>
      <text:p text:style-name="P45"><text:span text:style-name="Absatz-Standardschriftart"><text:span text:style-name="T14">3.4 </text:span></text:span><text:span text:style-name="Absatz-Standardschriftart"><text:span text:style-name="T18">Datenformat</text:span></text:span>:</text:p>
      <text:p text:style-name="P45"/>
      <text:p text:style-name="P46">Die Trainingsdaten liegen im Chattemplateformat in einer „all.jsonl“-Datei und behalten folgende Inhaltsstruktur inne:</text:p>
      <text:p text:style-name="P47" loext:marker-style-name="T19"><text:span text:style-name="T20">{</text:span><text:span text:style-name="T21">"messages"</text:span><text:span text:style-name="T20">:[<text:line-break/>{</text:span><text:span text:style-name="T21">"role"</text:span><text:span text:style-name="T20">:</text:span><text:span text:style-name="T22">"system"</text:span><text:span text:style-name="T20">,</text:span><text:span text:style-name="T21">"content"</text:span><text:span text:style-name="T20">:</text:span><text:span text:style-name="T22">"</text:span><text:span text:style-name="T23">[Systemprompt]</text:span><text:span text:style-name="T22">"</text:span><text:span text:style-name="T20">},<text:line-break/>{</text:span><text:span text:style-name="T21">"role"</text:span><text:span text:style-name="T20">:</text:span><text:span text:style-name="T22">"user"</text:span><text:span text:style-name="T20">,</text:span><text:span text:style-name="T21">"content"</text:span><text:span text:style-name="T20">:</text:span><text:span text:style-name="T22">"</text:span><text:span text:style-name="T23">[Beispielfrage]</text:span><text:span text:style-name="T22">"</text:span><text:span text:style-name="T20">},<text:line-break/>{</text:span><text:span text:style-name="T21">"role"</text:span><text:span text:style-name="T20">:</text:span><text:span text:style-name="T22">"assistant"</text:span><text:span text:style-name="T20">,</text:span><text:span text:style-name="T21">"content"</text:span><text:span text:style-name="T20">:</text:span><text:span text:style-name="T22">"</text:span><text:span text:style-name="T23">[</text:span><text:span text:style-name="T24">Idealantwort</text:span><text:span text:style-name="T23">]</text:span><text:span text:style-name="T22">"</text:span><text:span text:style-name="T20">},</text:span></text:p>
      <text:p text:style-name="P48" loext:marker-style-name="T19">{<text:span text:style-name="T25">"role"</text:span>:<text:span text:style-name="T26">"system"</text:span>,<text:span text:style-name="T25">"content"</text:span>:<text:span text:style-name="T26">"</text:span><text:span text:style-name="T27">[Systemprompt]</text:span><text:span text:style-name="T26">"</text:span>},<text:line-break/>{<text:span text:style-name="T25">"role"</text:span>:<text:span text:style-name="T26">"user"</text:span>,<text:span text:style-name="T25">"content"</text:span>:<text:span text:style-name="T26">"</text:span><text:span text:style-name="T27">[Beispielfrage]</text:span><text:span text:style-name="T26">"</text:span>},<text:line-break/>{<text:span text:style-name="T25">"role"</text:span>:<text:span text:style-name="T26">"assistant"</text:span>,<text:span text:style-name="T25">"content"</text:span>:<text:span text:style-name="T26">"</text:span><text:span text:style-name="T27">[</text:span><text:span text:style-name="T28">Idealantwort</text:span><text:span text:style-name="T27">]</text:span><text:span text:style-name="T26">"</text:span>},</text:p>
      <text:p text:style-name="P48" loext:marker-style-name="T19">…<text:line-break/>]}</text:p>
      <text:p text:style-name="P49">Ziel beim Training ist der KI Beispiele zu geben, dabei wird der KI ein Dialog gegeben, die KI muss dann versuchen das letzte „assistant“-Lable zu beantworten, dann wird ein Loss (Abweichung) berechnet, der genutzt wird um die KI rekursiv anzupassen. Diesen Vorgang nennt man KI Training bzw. Finetuning.</text:p>
      <text:p text:style-name="P49"/>
      <text:p text:style-name="Standard"><text:span text:style-name="Absatz-Standardschriftart"><text:span text:style-name="T14">3.</text:span></text:span><text:span text:style-name="Absatz-Standardschriftart"><text:span text:style-name="T29">5</text:span></text:span><text:span text:style-name="Absatz-Standardschriftart"><text:span text:style-name="T14"> </text:span></text:span><text:span text:style-name="Absatz-Standardschriftart"><text:span text:style-name="T15">Produkt</text:span></text:span>:</text:p>
      <text:p text:style-name="Standard">Modell <text:span text:style-name="Absatz-Standardschriftart"><text:span text:style-name="T5">Version </text:span></text:span><text:span text:style-name="Absatz-Standardschriftart"><text:span text:style-name="T16">[2.1]</text:span></text:span><text:span text:style-name="Absatz-Standardschriftart"><text:span text:style-name="T5"> 0.2.0 </text:span></text:span><text:span text:style-name="Absatz-Standardschriftart"><text:span text:style-name="T16">[2.2]</text:span></text:span><text:span text:style-name="Absatz-Standardschriftart"><text:span text:style-name="T5"> 0.1.0</text:spa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0">4. <text:span text:style-name="T30">AI – Aber wie?</text:span></text:p>
      <text:p text:style-name="P51"><text:span text:style-name="Absatz-Standardschriftart"><text:span text:style-name="T14">4.1 </text:span></text:span><text:span text:style-name="Absatz-Standardschriftart"><text:span text:style-name="T31">Was ist KI?</text:span></text:span><text:span text:style-name="Absatz-Standardschriftart"><text:span text:style-name="T5">:</text:span></text:span></text:p>
      <text:p text:style-name="P52"><text:span text:style-name="Absatz-Standardschriftart"><text:span text:style-name="T32">Eine künstliche Intelligenz kurz KI oder im englischen AI</text:span></text:span><text:span text:style-name="Absatz-Standardschriftart"><text:span text:style-name="T33"> ist ein neuronales Netzwerk in Form eines Algorithmu</text:span></text:span><text:span text:style-name="Absatz-Standardschriftart"><text:span text:style-name="T34">s. </text:span></text:span><text:span text:style-name="Absatz-Standardschriftart"><text:span text:style-name="T32">Sie enthält sogenannte Gewichte als Gradienten und Tensoren, die bestimmen aus welchen Eingaben welche Ausgaben generiert werden. Wie gerade erwähnt verarbeitet eine KI Daten und da die Gewichte verändert werden können lässt sich eine KI trainieren, also das Anpassen der Gewichte zum Erfüllen bestimmter Tätigkeiten meist basierend auf gewisse Trainingsdaten.</text:span></text:span></text:p>
      <text:p text:style-name="P52"><text:span text:style-name="Absatz-Standardschriftart"><text:span text:style-name="T32"/></text:span></text:p>
      <text:p text:style-name="P53"><text:span text:style-name="Absatz-Standardschriftart"><text:span text:style-name="T35">4.</text:span></text:span><text:span text:style-name="Absatz-Standardschriftart"><text:span text:style-name="T36">2</text:span></text:span><text:span text:style-name="Absatz-Standardschriftart"><text:span text:style-name="T35"> </text:span></text:span><text:span text:style-name="Absatz-Standardschriftart"><text:span text:style-name="T37">Tokens</text:span></text:span><text:span text:style-name="Absatz-Standardschriftart"><text:span text:style-name="T38">:</text:span></text:span></text:p>
      <text:p text:style-name="P54">Eine KI ist ja bekanntlich dazu da eine Antwort zu generieren. Da ich nicht auf jeden Typ künstlicher Intelligenz eingehen kann, werde ich mich nur auf rekursive Transformer-Chatbot beschränken. Damit eine KI einen Inputtext überhaupt verstehen kann, muss die KI den Text zerlegen in so genannte Tokens. Tokens sind gut vergleichbar mit einzelnen Wörtern und Satzzeichen bzw. Sonderzeichen. <text:span text:style-name="T39">Zunächst sind die Tokens einfache Zahlen (pro Tokentyp ein Index), aber damit die KI jedes Wort als Bedeutung sieht müssen wir jedem Token Eigenschaften geben. Hier kommen Parameter ins Spiel. Die Anzahl an Parameter ist nämlich äquivalent zu der Anzahl der möglichen Eigenschaften pro Wort bzw. (für Nerds) die Dimensionsgröße eines Tokenvektors. Hier ein Beispiel, wie das Aussehen könnte:</text:span></text:p>
      <text:p text:style-name="P54"/>
      <text:p text:style-name="P55">Erdbeere</text:p>
      <text:p text:style-name="P55">Substantivartig: 0.98</text:p>
      <text:p text:style-name="P55">Großgeschrieben: 0.9998</text:p>
      <text:p text:style-name="P55">Lebensmittel: 0.999</text:p>
      <text:p text:style-name="P55">Werkzeug: 0.001</text:p>
      <text:p text:style-name="P56">Sommer: 0.639</text:p>
      <text:p text:style-name="P56">Pflanze: 0.849</text:p>
      <text:p text:style-name="P56">Weltraum: 0.00039</text:p>
      <text:p text:style-name="P57">Marmelade: 0.83</text:p>
      <text:p text:style-name="P57"/>
      <text:p text:style-name="P58">So könnte eine Eingabe in Tokens aussehen:</text:p>
      <table:table table:name="Tabelle5" table:style-name="Tabelle5">
        <table:table-column table:style-name="Tabelle5.A" table:number-columns-repeated="2"/>
        <table:table-row>
          <table:table-cell table:style-name="Tabelle5.A1" office:value-type="string">
            <text:p text:style-name="P59">Eingabe im Klartext</text:p>
          </table:table-cell>
          <table:table-cell table:style-name="Tabelle5.B1" office:value-type="string">
            <text:p text:style-name="P59">Eingabe in Tokens ([TOKEN] ist ein Token)</text:p>
          </table:table-cell>
        </table:table-row>
        <table:table-row table:style-name="Tabelle5.2">
          <table:table-cell table:style-name="Tabelle5.A2" office:value-type="string">
            <text:p text:style-name="P59">Hallo,</text:p>
            <text:p text:style-name="P59">kannst du mir bitte ein paar Informationen zu HTWK Leipzig auflisten?</text:p>
          </table:table-cell>
          <table:table-cell table:style-name="Tabelle5.B2" office:value-type="string">
            <text:p text:style-name="P60">[HALLO][,][\n][kannst][du][mir][bitte][ein][paar][Informationen][zur][H][T][W][K][L<text:span text:style-name="T40">][</text:span>e<text:span text:style-name="T40">][</text:span>i<text:span text:style-name="T40">][</text:span>p<text:span text:style-name="T40">][</text:span>z<text:span text:style-name="T40">][</text:span>i<text:span text:style-name="T40">][</text:span>g][auflisten][?]</text:p>
          </table:table-cell>
        </table:table-row>
      </table:table>
      <text:p text:style-name="P61"/>
      <text:p text:style-name="P56"/>
      <text:p text:style-name="P62">Das ist natürlich nur beispielhaft aber es zeigt, wie die KI auf einmal eine Art „Gefühl“ bekommt für Wörter und diese überhaupt miteinander Vergleichen kan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Absatz-Standardschriftart"><text:span text:style-name="T41">4.</text:span></text:span><text:span text:style-name="Absatz-Standardschriftart"><text:span text:style-name="T42">3</text:span></text:span><text:span text:style-name="Absatz-Standardschriftart"><text:span text:style-name="T41"> </text:span></text:span><text:span text:style-name="Absatz-Standardschriftart"><text:span text:style-name="T43">Rekursive Vervollständigung</text:span></text:span><text:span text:style-name="Absatz-Standardschriftart"><text:span text:style-name="T44">:</text:span></text:span></text:p>
      <text:p text:style-name="P64"><text:span text:style-name="Absatz-Standardschriftart"><text:span text:style-name="T45">Wenn der Nutzer eine Nachricht zu der KI sendet passiert im Hintergrund einiges. Der neue Prompt wird an den Systemprompt und der gesamten History (der Bisherige Chat) </text:span></text:span><text:span text:style-name="Absatz-Standardschriftart"><text:span text:style-name="T46">angehängt</text:span></text:span><text:span text:style-name="Absatz-Standardschriftart"><text:span text:style-name="T45">. Das sieht dann in etwa so aus:</text:span></text:span></text:p>
      <text:p text:style-name="P65"><text:span text:style-name="Absatz-Standardschriftart"><text:span text:style-name="T47">&lt;system&gt;Du bist ein freundlicher, hilfsbereiter und genauer Chatbot.&lt;/system&gt;</text:span></text:span></text:p>
      <text:p text:style-name="P65"><text:span text:style-name="Absatz-Standardschriftart"><text:span text:style-name="T47">&lt;user&gt;Hallo! Wer bist du?&lt;/user&gt;</text:span></text:span></text:p>
      <text:p text:style-name="P65"><text:span text:style-name="Absatz-Standardschriftart"><text:span text:style-name="T47">&lt;assistent&gt;Hallo, ich bin Scientia ein hilfsbereiter Chatbot.&lt;/assistent&gt;</text:span></text:span></text:p>
      <text:p text:style-name="P65"><text:span text:style-name="Absatz-Standardschriftart"><text:span text:style-name="T47">&lt;user&gt;Was ist 1 + 2 * 10 ^ 2000000?&lt;/user&gt;</text:span></text:span></text:p>
      <text:p text:style-name="P65"><text:span text:style-name="Absatz-Standardschriftart"><text:span text:style-name="T47"/></text:span></text:p>
      <text:p text:style-name="P66"><text:span text:style-name="Absatz-Standardschriftart"><text:span text:style-name="T45"/></text:span></text:p>
      <text:p text:style-name="P67">Dies zusammengesetzte Eingabe wird zunächst in eine Tokensequenz umgewandelt. Das KI-Modell versucht jetzt diesen Input zu ergänzen und zwar um eine Antwort. Z.B:</text:p>
      <text:p text:style-name="P67"/>
      <text:p text:style-name="P68">&lt;assistent&gt;Leider kann ich dir diese Zahl nicht ausschreiben,</text:p>
      <text:p text:style-name="P69">aber du kannst sie dir wie folgt vorstellen:</text:p>
      <text:p text:style-name="P69">Eine Zwei mit 1999999 Nullen und einer Eins zum Schluss.&lt;/assistent&gt;</text:p>
      <text:p text:style-name="P70"/>
      <text:p text:style-name="Liste">Dafür wird dem Modell die Eingabe als Tokensequenz gegeben und es hängt ein passendes Token an. Man sagt auch das Modell zieht ein Token aus den Tokenpool. Jedenfalls wird das generierte Token an die Eingabe UND Ausgabe angehängt. <text:span text:style-name="T48">Das ganze wiederholt sic</text:span><text:span text:style-name="T49">h: Der Chatbot vervollständigt um einen Token und hängt ihn an die Ein- und Ausgabe an. Das macht er so lange, bis er ein eos-Token (End of Sequence) zurückgibt. Wenn er dieses Token aus dem Pool zieht, ist die Ausgabe zu Ende, die Ausgabe wird zurückgegeben und der Benutzer bekommt seine Antwort.</text:span></text:p>
      <text:p text:style-name="P71">Hier ist ein Beispiel, das einen solchen Vorgang beispilhaft zeigen soll:</text:p>
      <text:p text:style-name="P71">Stage 0:</text:p>
      <text:p text:style-name="P72"><text:span text:style-name="Absatz-Standardschriftart"><text:span text:style-name="T47">&lt;user&gt;</text:span></text:span><text:span text:style-name="Absatz-Standardschriftart"><text:span text:style-name="T50">Hi</text:span></text:span><text:span text:style-name="Absatz-Standardschriftart"><text:span text:style-name="T47">&lt;/user&gt;</text:span></text:span></text:p>
      <text:p text:style-name="P72"><text:span text:style-name="Absatz-Standardschriftart"><text:span text:style-name="T47">&lt;assistent&gt;</text:span></text:span></text:p>
      <text:p text:style-name="P71">Stage 1:</text:p>
      <text:p text:style-name="P72"><text:span text:style-name="Absatz-Standardschriftart"><text:span text:style-name="T47">&lt;user&gt;</text:span></text:span><text:span text:style-name="Absatz-Standardschriftart"><text:span text:style-name="T50">Hi</text:span></text:span><text:span text:style-name="Absatz-Standardschriftart"><text:span text:style-name="T47">&lt;/user&gt;</text:span></text:span></text:p>
      <text:p text:style-name="P72"><text:span text:style-name="Absatz-Standardschriftart"><text:span text:style-name="T47">&lt;assistent&gt;</text:span></text:span><text:span text:style-name="Absatz-Standardschriftart"><text:span text:style-name="T50">Hi</text:span></text:span></text:p>
      <text:p text:style-name="P71">Stage 2:</text:p>
      <text:p text:style-name="P72"><text:span text:style-name="Absatz-Standardschriftart"><text:span text:style-name="T47">&lt;user&gt;</text:span></text:span><text:span text:style-name="Absatz-Standardschriftart"><text:span text:style-name="T50">Hi</text:span></text:span><text:span text:style-name="Absatz-Standardschriftart"><text:span text:style-name="T47">&lt;/user&gt;</text:span></text:span></text:p>
      <text:p text:style-name="P72"><text:span text:style-name="Absatz-Standardschriftart"><text:span text:style-name="T47">&lt;assistent&gt;</text:span></text:span><text:span text:style-name="Absatz-Standardschriftart"><text:span text:style-name="T50">Hi,</text:span></text:span></text:p>
      <text:p text:style-name="P71">Stage 3:</text:p>
      <text:p text:style-name="P72"><text:span text:style-name="Absatz-Standardschriftart"><text:span text:style-name="T47">&lt;user&gt;</text:span></text:span><text:span text:style-name="Absatz-Standardschriftart"><text:span text:style-name="T50">Hi</text:span></text:span><text:span text:style-name="Absatz-Standardschriftart"><text:span text:style-name="T47">&lt;/user&gt;</text:span></text:span></text:p>
      <text:p text:style-name="P72"><text:span text:style-name="Absatz-Standardschriftart"><text:span text:style-name="T47">&lt;assistent&gt;</text:span></text:span><text:span text:style-name="Absatz-Standardschriftart"><text:span text:style-name="T50">Hi, ich</text:span></text:span></text:p>
      <text:p text:style-name="P71">Stage 4:</text:p>
      <text:p text:style-name="P72"><text:span text:style-name="Absatz-Standardschriftart"><text:span text:style-name="T47">&lt;user&gt;</text:span></text:span><text:span text:style-name="Absatz-Standardschriftart"><text:span text:style-name="T50">Hi</text:span></text:span><text:span text:style-name="Absatz-Standardschriftart"><text:span text:style-name="T47">&lt;/user&gt;</text:span></text:span></text:p>
      <text:p text:style-name="P72"><text:span text:style-name="Absatz-Standardschriftart"><text:span text:style-name="T47">&lt;assistent&gt;</text:span></text:span><text:span text:style-name="Absatz-Standardschriftart"><text:span text:style-name="T50">Hi, ich bin</text:span></text:span></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4. Präsentation</text:p>
      <text:p text:style-name="Standard"><text:span text:style-name="Absatz-Standardschriftart"><text:span text:style-name="T14">4.1 </text:span></text:span><text:span text:style-name="Absatz-Standardschriftart"><text:span text:style-name="T15">Ziel</text:span></text:span><text:span text:style-name="Absatz-Standardschriftart"><text:span text:style-name="T5">:</text:span></text:span></text:p>
      <text:p text:style-name="Standard">Das Präsentieren meiner Ziele, Arbeitsweise und Ergebnisse, sowie das Einführen in das KI-Finetuning</text:p>
      <text:p text:style-name="Standard"/>
      <text:p text:style-name="Standard"><text:span text:style-name="Absatz-Standardschriftart"><text:span text:style-name="T14">4.2 </text:span></text:span><text:span text:style-name="Absatz-Standardschriftart"><text:span text:style-name="T15">Mindestbenötigter Inhalt</text:span></text:span>:</text:p>
      <text:list text:style-name="L14">
        <text:list-item>
          <text:p text:style-name="P73">Mein Ziel</text:p>
        </text:list-item>
        <text:list-item>
          <text:p text:style-name="P73">Meine Arbeitsweise</text:p>
        </text:list-item>
        <text:list-item>
          <text:p text:style-name="P73">Meine Probleme und deren Lösungen</text:p>
        </text:list-item>
        <text:list-item>
          <text:p text:style-name="P73">Das Ergebnis</text:p>
        </text:list-item>
        <text:list-item>
          <text:p text:style-name="P73">Wie funktioniert ein Transformermodel bzw. Chatbot grundsätzlich</text:p>
        </text:list-item>
        <text:list-item>
          <text:p text:style-name="P73">Wie funktioniert das KI-Training</text:p>
        </text:list-item>
        <text:list-item>
          <text:p text:style-name="P73">Wie kann man es weiterentwickeln – Zukunftsausblicke</text:p>
        </text:list-item>
      </text:list>
      <text:p text:style-name="Standard"/>
      <text:p text:style-name="P74">4. <text:span text:style-name="T40">Quellen:</text:span></text:p>
      <text:list text:style-name="L15">
        <text:list-item>
          <text:p text:style-name="P75">Eigene Erfahrung und eigenes Wissen</text:p>
        </text:list-item>
        <text:list-item>
          <text:p text:style-name="P75">pypi.com</text:p>
        </text:list-item>
        <text:list-item>
          <text:p text:style-name="P75">huggingface.co</text:p>
        </text:list-item>
        <text:list-item>
          <text:p text:style-name="P75">npmjs.com</text:p>
        </text:list-item>
        <text:list-item>
          <text:p text:style-name="P75">apache.org</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Courier New" svg:font-family="'Courier New'"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eschriftung" style:family="paragraph">
      <style:paragraph-properties fo:margin-top="0.212cm" fo:margin-bottom="0.212cm" style:contextual-spacing="false" fo:hyphenation-ladder-count="no-limit" fo:hyphenation-keep="auto" loext:hyphenation-keep-type="column"/>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nabsatz" style:family="paragraph">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Aptos" fo:font-family="Aptos" style:font-family-generic="swiss" style:font-pitch="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creation-date>2026-06-23T08:31:00Z</meta:creation-date>
    <dc:date>2026-06-23T13:33:00.097601700</dc:date>
    <meta:editing-cycles>26</meta:editing-cycles>
    <meta:editing-duration>PT1H32M24S</meta:editing-duration>
    <meta:document-statistic meta:table-count="5" meta:image-count="1" meta:object-count="0" meta:page-count="10" meta:paragraph-count="251" meta:word-count="1849" meta:character-count="13253" meta:non-whitespace-character-count="11734"/>
    <meta:template xlink:type="simple" xlink:actuate="onRequest" xlink:title="" xlink:href="Normal.dotm"/>
  </office:meta>
</office:document-meta>
</file>